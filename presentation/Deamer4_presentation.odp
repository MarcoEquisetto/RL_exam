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14000002FFEB73458D.png"/>
  <manifest:file-entry manifest:media-type="image/png" manifest:full-path="Pictures/100002010000010000000100A6128726.png"/>
  <manifest:file-entry manifest:media-type="image/png" manifest:full-path="Pictures/1000020100000320000001203D5EA84A.png"/>
  <manifest:file-entry manifest:media-type="image/png" manifest:full-path="Pictures/100002010000010000000100774ABBB6.png"/>
  <manifest:file-entry manifest:media-type="image/png" manifest:full-path="Pictures/10000201000001000000010044CB969B.png"/>
  <manifest:file-entry manifest:media-type="image/png" manifest:full-path="Pictures/100002010000010000000100659F77F6.png"/>
  <manifest:file-entry manifest:media-type="image/png" manifest:full-path="Pictures/100002010000010000000100DB61BBA6.png"/>
  <manifest:file-entry manifest:media-type="image/png" manifest:full-path="Pictures/100002010000010000000100EDC6E0E8.png"/>
  <manifest:file-entry manifest:media-type="image/png" manifest:full-path="Pictures/100002010000010000000100B9BC7D42.png"/>
  <manifest:file-entry manifest:media-type="image/png" manifest:full-path="Pictures/1000020100000100000001005DC1394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0b1f3a"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solid" draw:fill-color="#12335c"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16406f"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1c7293" draw:auto-grow-height="false" fo:min-height="0cm" fo:min-width="0cm" fo:padding-top="0.125cm" fo:padding-bottom="0.125cm" fo:padding-left="0.25cm" fo:padding-right="0.25cm" fo:wrap-option="wrap"/>
    </style:style>
    <style:style style:name="gr4" style:family="graphic" style:parent-style-name="Oggetto_20_senza_20_riempimento_20_e_20_line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fo:min-height="0cm" fo:min-width="0cm" fo:padding-top="0cm" fo:padding-bottom="0cm" fo:padding-left="0cm" fo:padding-right="0cm" fo:wrap-option="wrap"/>
    </style:style>
    <style:style style:name="gr6" style:family="graphic" style:parent-style-name="standard" style:list-style-name="L2">
      <style:graphic-properties draw:stroke="none" svg:stroke-width="0cm" draw:fill="none" draw:textarea-vertical-align="middle" draw:auto-grow-height="false" fo:min-height="0cm" fo:min-width="0cm" fo:padding-top="0cm" fo:padding-bottom="0cm" fo:padding-left="0cm" fo:padding-right="0cm" fo:wrap-option="wrap"/>
    </style:style>
    <style:style style:name="gr7"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standard">
      <style:graphic-properties draw:stroke="none" svg:stroke-width="0cm" draw:fill="solid" draw:fill-color="#f2f6f8"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e4eef2"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0f2a4a"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53cm" svg:stroke-color="#ffffff" draw:fill="solid" draw:fill-color="#1c7293"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53cm" svg:stroke-color="#ffffff" draw:fill="solid" draw:fill-color="#d7e3ea" draw:auto-grow-height="false" fo:min-height="0cm" fo:min-width="0cm" fo:padding-top="0.125cm" fo:padding-bottom="0.125cm" fo:padding-left="0.25cm" fo:padding-right="0.25cm" fo:wrap-option="wrap"/>
    </style:style>
    <style:style style:name="gr14" style:family="graphic" style:parent-style-name="standard" style:list-style-name="L9">
      <style:graphic-properties draw:stroke="none" svg:stroke-width="0cm" draw:fill="none" draw:textarea-vertical-align="middle" draw:auto-grow-height="false" fo:min-height="0cm" fo:min-width="0cm" fo:padding-top="0cm" fo:padding-bottom="0cm" fo:padding-left="0cm" fo:padding-right="0cm" fo:wrap-option="wrap"/>
    </style:style>
    <style:style style:name="gr15" style:family="graphic" style:parent-style-name="standard" style:list-style-name="L6">
      <style:graphic-properties draw:stroke="none" svg:stroke-width="0cm" draw:fill="none" draw:textarea-vertical-align="middle" draw:auto-grow-height="false" fo:min-height="0cm" fo:min-width="0cm" fo:padding-top="0cm" fo:padding-bottom="0cm" fo:padding-left="0cm" fo:padding-right="0cm" fo:wrap-option="wrap"/>
    </style:style>
    <style:style style:name="gr16" style:family="graphic" style:parent-style-name="standard">
      <style:graphic-properties draw:stroke="none" svg:stroke-width="0cm" draw:fill="solid" draw:fill-color="#0b1f3a"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53cm" svg:stroke-color="#cbd5e1"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18" style:family="graphic" style:parent-style-name="standard">
      <style:graphic-properties draw:stroke="none" svg:stroke-width="0cm" draw:fill="solid" draw:fill-color="#cbd5e1" draw:auto-grow-height="false" fo:min-height="0cm" fo:min-width="0cm" fo:padding-top="0.125cm" fo:padding-bottom="0.125cm" fo:padding-left="0.25cm" fo:padding-right="0.25cm" fo:wrap-option="wrap"/>
    </style:style>
    <style:style style:name="gr19" style:family="graphic" style:parent-style-name="standard" style:list-style-name="L9">
      <style:graphic-properties draw:stroke="none" svg:stroke-width="0cm" draw:fill="none" draw:textarea-vertical-align="middle" draw:auto-grow-height="false" fo:min-height="0cm" fo:min-width="0cm" fo:padding-top="0cm" fo:padding-bottom="0cm" fo:padding-left="0cm" fo:padding-right="0cm" fo:wrap-option="wrap"/>
    </style:style>
    <style:style style:name="gr20" style:family="graphic" style:parent-style-name="standard">
      <style:graphic-properties draw:stroke="dash" draw:stroke-dash="Dash_20_4" svg:stroke-width="0.088cm" svg:stroke-color="#21c7a8" draw:marker-end="msArrowOpenEnd_20_5" draw:marker-end-width="0.396cm" draw:marker-end-center="false"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none" svg:stroke-width="0cm" draw:fill="solid" draw:fill-color="#21c7a8" draw:auto-grow-height="false" fo:min-height="0cm" fo:min-width="0cm" fo:padding-top="0.125cm" fo:padding-bottom="0.125cm" fo:padding-left="0.25cm" fo:padding-right="0.25cm" fo:wrap-option="wrap"/>
    </style:style>
    <style:style style:name="gr22" style:family="graphic" style:parent-style-name="standard" style:list-style-name="L9">
      <style:graphic-properties draw:stroke="none" svg:stroke-width="0cm" draw:fill="none" draw:textarea-vertical-align="middle" draw:auto-grow-height="false" fo:min-height="0cm" fo:min-width="0cm" fo:padding-top="0cm" fo:padding-bottom="0cm" fo:padding-left="0cm" fo:padding-right="0cm" fo:wrap-option="wrap"/>
    </style:style>
    <style:style style:name="gr23" style:family="graphic" style:parent-style-name="standard" style:list-style-name="L6">
      <style:graphic-properties draw:stroke="none" svg:stroke-width="0cm" draw:fill="none" draw:textarea-vertical-align="middle" draw:auto-grow-height="false" fo:min-height="0cm" fo:min-width="0cm" fo:padding-top="0cm" fo:padding-bottom="0cm" fo:padding-left="0cm" fo:padding-right="0cm" fo:wrap-option="wrap"/>
    </style:style>
    <style:style style:name="gr24" style:family="graphic" style:parent-style-name="standard">
      <style:graphic-properties draw:stroke="solid" svg:stroke-width="0.026cm" svg:stroke-color="#21c7a8" draw:fill="solid" draw:fill-color="#0f2a4a" draw:auto-grow-height="false" fo:min-height="0cm" fo:min-width="0cm" fo:padding-top="0.125cm" fo:padding-bottom="0.125cm" fo:padding-left="0.25cm" fo:padding-right="0.25cm" fo:wrap-option="wrap"/>
    </style:style>
    <style:style style:name="gr25" style:family="graphic" style:parent-style-name="standard" style:list-style-name="L1">
      <style:graphic-properties draw:stroke="none" svg:stroke-width="0cm" draw:fill="none" draw:textarea-vertical-align="middle" draw:auto-grow-height="false" fo:min-height="0cm" fo:min-width="0cm" fo:padding-top="0cm" fo:padding-bottom="0cm" fo:padding-left="0cm" fo:padding-right="0cm" fo:wrap-option="wrap"/>
    </style:style>
    <style:style style:name="gr26" style:family="graphic" style:parent-style-name="standard">
      <style:graphic-properties draw:stroke="solid" svg:stroke-width="0.088cm" svg:stroke-color="#1c7293" draw:marker-end="msArrowOpenEnd_20_5" draw:marker-end-width="0.396cm" draw:marker-end-center="false" draw:fill="none" draw:textarea-horizontal-align="center" draw:textarea-vertical-align="middle" draw:auto-grow-height="false" fo:padding-top="0.125cm" fo:padding-bottom="0.125cm" fo:padding-left="0.25cm" fo:padding-right="0.25cm" fo:wrap-option="wrap"/>
    </style:style>
    <style:style style:name="gr27" style:family="graphic" style:parent-style-name="standard">
      <style:graphic-properties draw:stroke="none" svg:stroke-width="0cm" draw:fill="solid" draw:fill-color="#e4f7f2" draw:auto-grow-height="false" fo:min-height="0cm" fo:min-width="0cm" fo:padding-top="0.125cm" fo:padding-bottom="0.125cm" fo:padding-left="0.25cm" fo:padding-right="0.25cm" fo:wrap-option="wrap"/>
    </style:style>
    <style:style style:name="gr28" style:family="graphic" style:parent-style-name="standard" style:list-style-name="L1">
      <style:graphic-properties draw:stroke="none" svg:stroke-width="0cm" draw:fill="none" draw:textarea-vertical-align="middle" draw:auto-grow-height="false" fo:min-height="0cm" fo:min-width="0cm" fo:padding-top="0cm" fo:padding-bottom="0cm" fo:padding-left="0cm" fo:padding-right="0cm" fo:wrap-option="wrap"/>
    </style:style>
    <style:style style:name="gr29" style:family="graphic" style:parent-style-name="standard" style:list-style-name="L9">
      <style:graphic-properties draw:stroke="none" svg:stroke-width="0cm" draw:fill="none" draw:textarea-vertical-align="middle" draw:auto-grow-height="false" fo:min-height="0cm" fo:min-width="0cm" fo:padding-top="0cm" fo:padding-bottom="0cm" fo:padding-left="0cm" fo:padding-right="0cm" fo:wrap-option="wrap"/>
    </style:style>
    <style:style style:name="pr1" style:family="presentation" style:parent-style-name="Predefinito-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Predefinito-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text-properties fo:font-size="18pt"/>
    </style:style>
    <style:style style:name="P2" style:family="paragraph">
      <style:paragraph-properties fo:text-align="center"/>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color="#009999" fo:font-family="'Segoe UI Black'" style:font-family-generic="swiss" style:font-pitch="variable" fo:font-size="18pt" fo:hyphenate="false"/>
    </style:style>
    <style:style style:name="P4" style:family="paragraph">
      <style:paragraph-properties style:font-independent-line-spacing="true"/>
      <style:text-properties fo:color="#009999" fo:font-family="'Segoe UI Black'" style:font-family-generic="swiss" style:font-pitch="variable" fo:font-size="18pt"/>
    </style:style>
    <style:style style:name="P5" style:family="paragraph">
      <style:paragraph-properties fo:margin-left="0cm" fo:margin-right="0cm" fo:margin-top="0cm" fo:margin-bottom="0cm" fo:line-height="105%" fo:text-align="start" fo:text-indent="0cm" style:punctuation-wrap="hanging" style:writing-mode="lr-tb"/>
      <style:text-properties fo:color="#ffffff" fo:font-size="18pt" fo:hyphenate="false"/>
    </style:style>
    <style:style style:name="P6" style:family="paragraph">
      <style:paragraph-properties fo:margin-left="0cm" fo:margin-right="0cm" fo:margin-top="0cm" fo:margin-bottom="0cm" fo:line-height="105%" fo:text-align="start" fo:text-indent="0cm" style:punctuation-wrap="hanging" style:writing-mode="lr-tb" style:font-independent-line-spacing="true"/>
      <style:text-properties fo:color="#ffffff" fo:font-size="18pt" fo:hyphenate="false"/>
    </style:style>
    <style:style style:name="P7" style:family="paragraph">
      <style:paragraph-properties fo:margin-left="0cm" fo:margin-right="0cm" fo:margin-top="0cm" fo:margin-bottom="0cm" fo:text-align="start" fo:text-indent="0cm" style:punctuation-wrap="hanging" style:writing-mode="lr-tb"/>
      <style:text-properties fo:color="#ffffff" fo:font-size="18pt" fo:hyphenate="false"/>
    </style:style>
    <style:style style:name="P8" style:family="paragraph">
      <style:paragraph-properties style:font-independent-line-spacing="true"/>
      <style:text-properties fo:color="#ffffff" fo:font-size="18pt"/>
    </style:style>
    <style:style style:name="P9" style:family="paragraph">
      <style:paragraph-properties fo:margin-left="0cm" fo:margin-right="0cm" fo:margin-top="0cm" fo:margin-bottom="0cm" fo:line-height="130%" fo:text-align="start" fo:text-indent="0cm" style:punctuation-wrap="hanging" style:writing-mode="lr-tb"/>
      <style:text-properties fo:color="#ffffff" fo:font-size="18pt" fo:hyphenate="false"/>
    </style:style>
    <style:style style:name="P10" style:family="paragraph">
      <style:paragraph-properties fo:text-align="center"/>
    </style:style>
    <style:style style:name="P11" style:family="paragraph">
      <style:paragraph-properties style:font-independent-line-spacing="true"/>
      <style:text-properties fo:font-size="18pt"/>
    </style:style>
    <style:style style:name="P12"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13" style:family="paragraph">
      <style:paragraph-properties fo:text-align="end" style:font-independent-line-spacing="true"/>
      <style:text-properties fo:font-size="18pt" style:font-size-asian="14pt" style:font-size-complex="14pt"/>
    </style:style>
    <style:style style:name="P14" style:family="paragraph">
      <style:paragraph-properties fo:margin-left="0cm" fo:margin-right="0cm" fo:margin-top="0cm" fo:margin-bottom="0cm" fo:text-align="start" fo:text-indent="0cm" style:punctuation-wrap="hanging" style:writing-mode="lr-tb"/>
      <style:text-properties fo:color="#0084d1" fo:font-family="'Bahnschrift SemiBold'" style:font-family-generic="swiss" style:font-pitch="variable" fo:font-size="18pt" fo:hyphenate="false"/>
    </style:style>
    <style:style style:name="P15" style:family="paragraph">
      <style:paragraph-properties style:font-independent-line-spacing="true"/>
      <style:text-properties fo:color="#0084d1" fo:font-family="'Bahnschrift SemiBold'" style:font-family-generic="swiss" style:font-pitch="variable" fo:font-size="18pt"/>
    </style:style>
    <style:style style:name="P16"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7" style:family="paragraph">
      <style:paragraph-properties fo:margin-left="0cm" fo:margin-right="0cm" fo:margin-top="0cm" fo:margin-bottom="0cm" fo:line-height="105%" fo:text-align="start" fo:text-indent="0cm" style:punctuation-wrap="hanging" style:writing-mode="lr-tb"/>
      <style:text-properties fo:font-size="18pt" fo:hyphenate="false"/>
    </style:style>
    <style:style style:name="P18" style:family="paragraph">
      <style:paragraph-properties fo:margin-left="0cm" fo:margin-right="0cm" fo:margin-top="0cm" fo:margin-bottom="0cm" fo:text-align="end" fo:text-indent="0cm" style:punctuation-wrap="hanging" style:writing-mode="lr-tb"/>
      <style:text-properties fo:font-size="18pt" fo:hyphenate="false"/>
    </style:style>
    <style:style style:name="P19" style:family="paragraph">
      <style:paragraph-properties fo:margin-left="0cm" fo:margin-right="0cm" fo:margin-top="0cm" fo:margin-bottom="0cm" fo:text-align="start" fo:text-indent="0cm" style:punctuation-wrap="hanging" style:writing-mode="lr-tb"/>
      <style:text-properties fo:color="#009999" fo:font-size="18pt" fo:hyphenate="false"/>
    </style:style>
    <style:style style:name="P20" style:family="paragraph">
      <style:paragraph-properties style:font-independent-line-spacing="true"/>
      <style:text-properties fo:color="#009999" fo:font-size="18pt"/>
    </style:style>
    <style:style style:name="P21" style:family="paragraph">
      <style:paragraph-properties fo:margin-left="0cm" fo:margin-right="0cm" fo:margin-top="0cm" fo:margin-bottom="0cm" fo:line-height="110%" fo:text-align="start" fo:text-indent="0cm" style:punctuation-wrap="hanging" style:writing-mode="lr-tb"/>
      <style:text-properties fo:color="#eeeeee" fo:font-size="18pt" fo:hyphenate="false"/>
    </style:style>
    <style:style style:name="P22" style:family="paragraph">
      <style:paragraph-properties style:font-independent-line-spacing="true"/>
      <style:text-properties fo:color="#eeeeee" fo:font-size="18pt"/>
    </style:style>
    <style:style style:name="P23" style:family="paragraph">
      <style:paragraph-properties fo:margin-left="0cm" fo:margin-right="0cm" fo:margin-top="0cm" fo:margin-bottom="0cm" fo:line-height="105%" fo:text-align="start" fo:text-indent="0cm" style:punctuation-wrap="hanging" style:writing-mode="lr-tb" style:font-independent-line-spacing="true"/>
      <style:text-properties fo:font-size="18pt" fo:hyphenate="false"/>
    </style:style>
    <style:style style:name="P24" style:family="paragraph">
      <style:paragraph-properties fo:margin-left="0cm" fo:margin-right="0cm" fo:margin-top="0cm" fo:margin-bottom="0cm" fo:text-align="start" fo:text-indent="0cm" style:punctuation-wrap="hanging" style:writing-mode="lr-tb" style:font-independent-line-spacing="true"/>
      <style:text-properties fo:color="#0084d1" fo:font-family="'Bahnschrift SemiBold'" style:font-family-generic="swiss" style:font-pitch="variable" fo:font-size="18pt" fo:hyphenate="false"/>
    </style:style>
    <style:style style:name="P25"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26"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7" style:family="paragraph">
      <style:paragraph-properties fo:text-align="center" style:font-independent-line-spacing="true"/>
      <style:text-properties fo:font-size="18pt"/>
    </style:style>
    <style:style style:name="P28" style:family="paragraph">
      <style:paragraph-properties fo:margin-left="0cm" fo:margin-right="0cm" fo:margin-top="0cm" fo:margin-bottom="0cm" fo:text-align="start" fo:text-indent="0cm" style:punctuation-wrap="hanging" style:writing-mode="lr-tb"/>
      <style:text-properties fo:color="#009999" fo:font-family="'Bahnschrift SemiBold'" style:font-family-generic="swiss" style:font-pitch="variable" fo:font-size="18pt" fo:hyphenate="false"/>
    </style:style>
    <style:style style:name="P29" style:family="paragraph">
      <style:paragraph-properties style:font-independent-line-spacing="true"/>
      <style:text-properties fo:color="#009999" fo:font-family="'Bahnschrift SemiBold'" style:font-family-generic="swiss" style:font-pitch="variable" fo:font-size="18pt"/>
    </style:style>
    <style:style style:name="P30" style:family="paragraph">
      <style:paragraph-properties fo:margin-left="0cm" fo:margin-right="0cm" fo:margin-top="0cm" fo:margin-bottom="0cm" fo:line-height="115%" fo:text-align="start" fo:text-indent="0cm" style:punctuation-wrap="hanging" style:writing-mode="lr-tb"/>
      <style:text-properties fo:color="#ffffff" fo:font-size="18pt" fo:hyphenate="false"/>
    </style:style>
    <style:style style:name="P31" style:family="paragraph">
      <style:paragraph-properties fo:margin-left="0cm" fo:margin-right="0cm" fo:margin-top="0cm" fo:margin-bottom="0cm" fo:text-align="center" fo:text-indent="0cm" style:punctuation-wrap="hanging" style:writing-mode="lr-tb"/>
      <style:text-properties fo:color="#00cccc" fo:font-size="18pt" fo:hyphenate="false"/>
    </style:style>
    <style:style style:name="P32" style:family="paragraph">
      <style:paragraph-properties style:font-independent-line-spacing="true"/>
      <style:text-properties fo:color="#00cccc" fo:font-size="18pt"/>
    </style:style>
    <style:style style:name="P33" style:family="paragraph">
      <style:paragraph-properties fo:margin-left="0cm" fo:margin-right="0cm" fo:margin-top="0cm" fo:margin-bottom="0cm" fo:line-height="110%" fo:text-align="center" fo:text-indent="0cm" style:punctuation-wrap="hanging" style:writing-mode="lr-tb"/>
      <style:text-properties fo:color="#ffffff" fo:font-size="18pt" fo:hyphenate="false"/>
    </style:style>
    <style:style style:name="P34" style:family="paragraph">
      <style:paragraph-properties fo:margin-left="0cm" fo:margin-right="0cm" fo:margin-top="0cm" fo:margin-bottom="0cm" fo:line-height="115%" fo:text-align="start" fo:text-indent="0cm" style:punctuation-wrap="hanging" style:writing-mode="lr-tb"/>
      <style:text-properties fo:font-size="18pt" fo:hyphenate="false"/>
    </style:style>
    <style:style style:name="P35" style:family="paragraph">
      <style:paragraph-properties fo:margin-left="0cm" fo:margin-right="0cm" fo:margin-top="0cm" fo:margin-bottom="0cm" fo:text-align="end" fo:text-indent="0cm" style:punctuation-wrap="hanging" style:writing-mode="lr-tb"/>
      <style:text-properties fo:color="#ffffff" fo:font-size="18pt" fo:hyphenate="false"/>
    </style:style>
    <style:style style:name="P36" style:family="paragraph">
      <style:paragraph-properties fo:margin-left="0cm" fo:margin-right="0cm" fo:margin-top="0cm" fo:margin-bottom="0cm" fo:text-align="start" fo:text-indent="0cm" style:punctuation-wrap="hanging" style:writing-mode="lr-tb" style:font-independent-line-spacing="true"/>
      <style:text-properties fo:color="#009999" fo:font-family="'Bahnschrift SemiBold'" style:font-family-generic="swiss" style:font-pitch="variable" fo:font-size="18pt" fo:hyphenate="false"/>
    </style:style>
    <style:style style:name="P37" style:family="paragraph">
      <style:paragraph-properties fo:margin-left="0cm" fo:margin-right="0cm" fo:margin-top="0cm" fo:margin-bottom="0cm" fo:line-height="120%" fo:text-align="center" fo:text-indent="0cm" style:punctuation-wrap="hanging" style:writing-mode="lr-tb"/>
      <style:text-properties fo:font-size="18pt" fo:hyphenate="false"/>
    </style:style>
    <style:style style:name="P38" style:family="paragraph">
      <style:paragraph-properties fo:margin-left="0cm" fo:margin-right="0cm" fo:margin-top="0cm" fo:margin-bottom="0cm" fo:text-align="center" fo:text-indent="0cm" style:punctuation-wrap="hanging" style:writing-mode="lr-tb"/>
      <style:text-properties fo:color="#009999" fo:font-size="18pt" fo:hyphenate="false"/>
    </style:style>
    <style:style style:name="P39" style:family="paragraph">
      <style:paragraph-properties fo:margin-left="0cm" fo:margin-right="0cm" fo:margin-top="0cm" fo:margin-bottom="0cm" fo:text-align="center" fo:text-indent="0cm" style:punctuation-wrap="hanging" style:writing-mode="lr-tb"/>
      <style:text-properties fo:color="#ffffff" fo:font-size="18pt" fo:hyphenate="false"/>
    </style:style>
    <style:style style:name="P40" style:family="paragraph">
      <style:paragraph-properties fo:margin-left="0cm" fo:margin-right="0cm" fo:margin-top="0cm" fo:margin-bottom="0cm" fo:line-height="110%" fo:text-align="start" fo:text-indent="0cm" style:punctuation-wrap="hanging" style:writing-mode="lr-tb"/>
      <style:text-properties fo:color="#ffffff" fo:font-size="18pt" fo:hyphenate="false"/>
    </style:style>
    <style:style style:name="P41" style:family="paragraph">
      <style:paragraph-properties fo:margin-left="0cm" fo:margin-right="0cm" fo:margin-top="0cm" fo:margin-bottom="0cm" fo:text-align="end" fo:text-indent="0cm" style:punctuation-wrap="hanging" style:writing-mode="lr-tb" style:font-independent-line-spacing="true"/>
      <style:text-properties fo:color="#ffffff" fo:font-size="18pt" fo:hyphenate="false"/>
    </style:style>
    <style:style style:name="T1" style:family="text">
      <style:text-properties fo:color="#009999" style:text-line-through-style="none" fo:font-family="'Segoe UI Black'" style:font-family-generic="swiss" style:font-pitch="variable" fo:font-size="14pt" fo:letter-spacing="normal" fo:font-style="normal" style:text-underline-style="none" fo:font-weight="bold" style:font-family-asian="Calibri" style:font-pitch-asian="fixed" style:font-size-asian="14pt" style:font-style-asian="normal" style:font-weight-asian="bold" style:font-family-complex="Calibri" style:font-family-generic-complex="swiss" style:font-size-complex="14pt" style:font-style-complex="normal" style:font-weight-complex="bold"/>
    </style:style>
    <style:style style:name="T2" style:family="text">
      <style:text-properties fo:color="#ffffff" style:text-line-through-style="none" fo:font-family="Cambria" style:font-family-generic="swiss" fo:font-size="40pt" fo:letter-spacing="normal" fo:font-style="normal" style:text-underline-style="none" fo:font-weight="bold" style:font-family-asian="Cambria" style:font-pitch-asian="fixed" style:font-size-asian="40pt" style:font-style-asian="normal" style:font-weight-asian="bold" style:font-family-complex="Cambria" style:font-family-generic-complex="swiss" style:font-size-complex="40pt" style:font-style-complex="normal" style:font-weight-complex="bold"/>
    </style:style>
    <style:style style:name="T3" style:family="text">
      <style:text-properties fo:color="#ffffff" style:text-line-through-style="none" fo:font-family="Calibri" style:font-family-generic="swiss" fo:font-size="16pt" fo:letter-spacing="normal" fo:font-style="italic" style:text-underline-style="none" fo:font-weight="normal" style:font-family-asian="Calibri" style:font-pitch-asian="fixed" style:font-size-asian="16pt" style:font-style-asian="italic" style:font-weight-asian="normal" style:font-family-complex="Calibri" style:font-family-generic-complex="swiss" style:font-size-complex="16pt" style:font-style-complex="italic" style:font-weight-complex="normal"/>
    </style:style>
    <style:style style:name="T4" style:family="text">
      <style:text-properties fo:color="#ffffff" style:text-line-through-style="none" fo:font-family="Calibri" style:font-family-generic="swiss" fo:font-size="13pt" fo:letter-spacing="normal" fo:font-style="normal" style:text-underline-style="none" fo:font-weight="bold" style:font-family-asian="Calibri" style:font-pitch-asian="fixed" style:font-size-asian="13pt" style:font-style-asian="normal" style:font-weight-asian="bold" style:font-family-complex="Calibri" style:font-family-generic-complex="swiss" style:font-size-complex="13pt" style:font-style-complex="normal" style:font-weight-complex="bold"/>
    </style:style>
    <style:style style:name="T5" style:family="text">
      <style:text-properties fo:color="#ffffff" style:text-line-through-style="none" fo:font-family="Calibri" style:font-family-generic="swiss" fo:font-size="13pt" fo:letter-spacing="normal" fo:font-style="normal" style:text-underline-style="none" fo:font-weight="normal" style:font-family-asian="Calibri" style:font-pitch-asian="fixed" style:font-size-asian="13pt" style:font-style-asian="normal" style:font-weight-asian="normal" style:font-family-complex="Calibri" style:font-family-generic-complex="swiss" style:font-size-complex="13pt" style:font-style-complex="normal" style:font-weight-complex="normal"/>
    </style:style>
    <style:style style:name="T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8" style:family="text">
      <style:text-properties fo:color="#0084d1" style:text-line-through-style="none" fo:font-family="'Bahnschrift SemiBold'" style:font-family-generic="swiss" style:font-pitch="variable" fo:font-size="12pt" fo:letter-spacing="normal" fo:font-style="normal" style:text-underline-style="none" fo:font-weight="bold" style:font-family-asian="Calibri" style:font-pitch-asian="fixed" style:font-size-asian="12pt" style:font-style-asian="normal" style:font-weight-asian="bold" style:font-family-complex="Calibri" style:font-family-generic-complex="swiss" style:font-size-complex="12pt" style:font-style-complex="normal" style:font-weight-complex="bold"/>
    </style:style>
    <style:style style:name="T9" style:family="text">
      <style:text-properties fo:color="#000000" style:text-line-through-style="none" fo:font-family="Cambria" style:font-family-generic="swiss" fo:font-size="32pt" fo:letter-spacing="normal" fo:font-style="normal" style:text-underline-style="none" fo:font-weight="bold" style:font-family-asian="Cambria" style:font-pitch-asian="fixed" style:font-size-asian="32pt" style:font-style-asian="normal" style:font-weight-asian="bold" style:font-family-complex="Cambria" style:font-family-generic-complex="swiss" style:font-size-complex="32pt" style:font-style-complex="normal" style:font-weight-complex="bold"/>
    </style:style>
    <style:style style:name="T10" style:family="text">
      <style:text-properties fo:color="#000000" style:text-line-through-style="none" fo:font-family="Cambria" style:font-family-generic="swiss" fo:font-size="15pt" fo:letter-spacing="normal" fo:font-style="normal" style:text-underline-style="none" fo:font-weight="bold" style:font-family-asian="Cambria" style:font-pitch-asian="fixed" style:font-size-asian="15pt" style:font-style-asian="normal" style:font-weight-asian="bold" style:font-family-complex="Cambria" style:font-family-generic-complex="swiss" style:font-size-complex="15pt" style:font-style-complex="normal" style:font-weight-complex="bold"/>
    </style:style>
    <style:style style:name="T11" style:family="text">
      <style:text-properties fo:color="#000000" style:text-line-through-style="none" fo:font-family="Calibri" style:font-family-generic="swiss" fo:font-size="11.5pt" fo:letter-spacing="normal" fo:font-style="normal" style:text-underline-style="none" fo:font-weight="normal" style:font-family-asian="Calibri" style:font-pitch-asian="fixed" style:font-size-asian="11.5pt" style:font-style-asian="normal" style:font-weight-asian="normal" style:font-family-complex="Calibri" style:font-family-generic-complex="swiss" style:font-size-complex="11.5pt" style:font-style-complex="normal" style:font-weight-complex="normal"/>
    </style:style>
    <style:style style:name="T12" style:family="text">
      <style:text-properties fo:color="#000000" style:text-line-through-style="none" fo:font-family="Calibri" style:font-family-generic="swiss" fo:font-size="9pt" fo:letter-spacing="normal" fo:font-style="normal" style:text-underline-style="none" fo:font-weight="normal" style:font-family-asian="Calibri" style:font-pitch-asian="fixed" style:font-size-asian="9pt" style:font-style-asian="normal" style:font-weight-asian="normal" style:font-family-complex="Calibri" style:font-family-generic-complex="swiss" style:font-size-complex="9pt" style:font-style-complex="normal" style:font-weight-complex="normal"/>
    </style:style>
    <style:style style:name="T13" style:family="text">
      <style:text-properties fo:color="#000000" style:text-line-through-style="none" fo:font-family="Cambria" style:font-family-generic="swiss" fo:font-size="14pt" fo:letter-spacing="normal" fo:font-style="normal" style:text-underline-style="none" fo:font-weight="bold" style:font-family-asian="Cambria" style:font-pitch-asian="fixed" style:font-size-asian="14pt" style:font-style-asian="normal" style:font-weight-asian="bold" style:font-family-complex="Cambria" style:font-family-generic-complex="swiss" style:font-size-complex="14pt" style:font-style-complex="normal" style:font-weight-complex="bold"/>
    </style:style>
    <style:style style:name="T14" style:family="text">
      <style:text-properties fo:color="#000000" style:text-line-through-style="none" fo:font-family="Calibri" style:font-family-generic="swiss" fo:font-size="12pt" fo:letter-spacing="normal" fo:font-style="normal" style:text-underline-style="none" fo:font-weight="normal" style:font-family-asian="Calibri" style:font-pitch-asian="fixed" style:font-size-asian="12pt" style:font-style-asian="normal" style:font-weight-asian="normal" style:font-family-complex="Calibri" style:font-family-generic-complex="swiss" style:font-size-complex="12pt" style:font-style-complex="normal" style:font-weight-complex="normal"/>
    </style:style>
    <style:style style:name="T15" style:family="text">
      <style:text-properties fo:color="#009999" style:text-line-through-style="none" fo:font-family="Cambria" style:font-family-generic="swiss" fo:font-size="12.5pt" fo:letter-spacing="normal" fo:font-style="normal" style:text-underline-style="none" fo:font-weight="bold" style:font-family-asian="Cambria" style:font-pitch-asian="fixed" style:font-size-asian="12.5pt" style:font-style-asian="normal" style:font-weight-asian="bold" style:font-family-complex="Cambria" style:font-family-generic-complex="swiss" style:font-size-complex="12.5pt" style:font-style-complex="normal" style:font-weight-complex="bold"/>
    </style:style>
    <style:style style:name="T16" style:family="text">
      <style:text-properties fo:color="#eeeeee" style:text-line-through-style="none" fo:font-family="Calibri" style:font-family-generic="swiss" fo:font-size="11.5pt" fo:letter-spacing="normal" fo:font-style="normal" style:text-underline-style="none" fo:font-weight="normal" style:font-family-asian="Calibri" style:font-pitch-asian="fixed" style:font-size-asian="11.5pt" style:font-style-asian="normal" style:font-weight-asian="normal" style:font-family-complex="Calibri" style:font-family-generic-complex="swiss" style:font-size-complex="11.5pt" style:font-style-complex="normal" style:font-weight-complex="normal"/>
    </style:style>
    <style:style style:name="T17" style:family="text">
      <style:text-properties fo:color="#000000" style:text-line-through-style="none" fo:font-family="Calibri" style:font-family-generic="swiss" fo:font-size="10pt" fo:letter-spacing="normal" fo:font-style="italic" style:text-underline-style="none" fo:font-weight="normal" style:font-family-asian="Calibri" style:font-pitch-asian="fixed" style:font-size-asian="10pt" style:font-style-asian="italic" style:font-weight-asian="normal" style:font-family-complex="Calibri" style:font-family-generic-complex="swiss" style:font-size-complex="10pt" style:font-style-complex="italic" style:font-weight-complex="normal"/>
    </style:style>
    <style:style style:name="T18" style:family="text">
      <style:text-properties fo:color="#000000" style:text-line-through-style="none" fo:font-family="Calibri" style:font-family-generic="swiss" fo:font-size="11pt" fo:letter-spacing="normal" fo:font-style="normal" style:text-underline-style="none" fo:font-weight="bold" style:font-family-asian="Calibri" style:font-pitch-asian="fixed" style:font-size-asian="11pt" style:font-style-asian="normal" style:font-weight-asian="bold" style:font-family-complex="Calibri" style:font-family-generic-complex="swiss" style:font-size-complex="11pt" style:font-style-complex="normal" style:font-weight-complex="bold"/>
    </style:style>
    <style:style style:name="T19" style:family="text">
      <style:text-properties fo:color="#000000" style:text-line-through-style="none" fo:font-family="Calibri" style:font-family-generic="swiss" fo:font-size="10.5pt" fo:letter-spacing="normal" fo:font-style="italic" style:text-underline-style="none" fo:font-weight="bold" style:font-family-asian="Calibri" style:font-pitch-asian="fixed" style:font-size-asian="10.5pt" style:font-style-asian="italic" style:font-weight-asian="bold" style:font-family-complex="Calibri" style:font-family-generic-complex="swiss" style:font-size-complex="10.5pt" style:font-style-complex="italic" style:font-weight-complex="bold"/>
    </style:style>
    <style:style style:name="T20" style:family="text">
      <style:text-properties fo:color="#000000" style:text-line-through-style="none" fo:font-family="Calibri" style:font-family-generic="swiss" fo:font-size="10.5pt" fo:letter-spacing="normal" fo:font-style="italic" style:text-underline-style="none" fo:font-weight="normal" style:font-family-asian="Calibri" style:font-pitch-asian="fixed" style:font-size-asian="10.5pt" style:font-style-asian="italic" style:font-weight-asian="normal" style:font-family-complex="Calibri" style:font-family-generic-complex="swiss" style:font-size-complex="10.5pt" style:font-style-complex="italic" style:font-weight-complex="normal"/>
    </style:style>
    <style:style style:name="T21" style:family="text">
      <style:text-properties fo:color="#009999" style:text-line-through-style="none" fo:font-family="Calibri" style:font-family-generic="swiss" fo:font-size="11pt" fo:letter-spacing="normal" fo:font-style="normal" style:text-underline-style="none" fo:font-weight="bold" style:font-family-asian="Calibri" style:font-pitch-asian="fixed" style:font-size-asian="11pt" style:font-style-asian="normal" style:font-weight-asian="bold" style:font-family-complex="Calibri" style:font-family-generic-complex="swiss" style:font-size-complex="11pt" style:font-style-complex="normal" style:font-weight-complex="bold"/>
    </style:style>
    <style:style style:name="T22" style:family="text">
      <style:text-properties fo:color="#000000" style:text-line-through-style="none" fo:font-family="Calibri" style:font-family-generic="swiss" fo:font-size="9pt" fo:letter-spacing="normal" fo:font-style="normal" style:text-underline-style="none" fo:font-weight="bold" style:font-family-asian="Calibri" style:font-pitch-asian="fixed" style:font-size-asian="9pt" style:font-style-asian="normal" style:font-weight-asian="bold" style:font-family-complex="Calibri" style:font-family-generic-complex="swiss" style:font-size-complex="9pt" style:font-style-complex="normal" style:font-weight-complex="bold"/>
    </style:style>
    <style:style style:name="T23" style:family="text">
      <style:text-properties fo:color="#000000" style:text-line-through-style="none" fo:font-family="Calibri" style:font-family-generic="swiss" fo:font-size="11.5pt" fo:letter-spacing="normal" fo:font-style="normal" style:text-underline-style="none" fo:font-weight="bold" style:font-family-asian="Calibri" style:font-pitch-asian="fixed" style:font-size-asian="11.5pt" style:font-style-asian="normal" style:font-weight-asian="bold" style:font-family-complex="Calibri" style:font-family-generic-complex="swiss" style:font-size-complex="11.5pt" style:font-style-complex="normal" style:font-weight-complex="bold"/>
    </style:style>
    <style:style style:name="T24" style:family="text">
      <style:text-properties fo:color="#009999" style:text-line-through-style="none" fo:font-family="'Bahnschrift SemiBold'" style:font-family-generic="swiss" style:font-pitch="variable" fo:font-size="12pt" fo:letter-spacing="normal" fo:font-style="normal" style:text-underline-style="none" fo:font-weight="bold" style:font-family-asian="Calibri" style:font-pitch-asian="fixed" style:font-size-asian="12pt" style:font-style-asian="normal" style:font-weight-asian="bold" style:font-family-complex="Calibri" style:font-family-generic-complex="swiss" style:font-size-complex="12pt" style:font-style-complex="normal" style:font-weight-complex="bold"/>
    </style:style>
    <style:style style:name="T25" style:family="text">
      <style:text-properties fo:color="#ffffff" style:text-line-through-style="none" fo:font-family="Cambria" style:font-family-generic="swiss" fo:font-size="30pt" fo:letter-spacing="normal" fo:font-style="normal" style:text-underline-style="none" fo:font-weight="bold" style:font-family-asian="Cambria" style:font-pitch-asian="fixed" style:font-size-asian="30pt" style:font-style-asian="normal" style:font-weight-asian="bold" style:font-family-complex="Cambria" style:font-family-generic-complex="swiss" style:font-size-complex="30pt" style:font-style-complex="normal" style:font-weight-complex="bold"/>
    </style:style>
    <style:style style:name="T26" style:family="text">
      <style:text-properties fo:color="#009999" style:text-line-through-style="none" fo:font-family="Calibri" style:font-family-generic="swiss" fo:font-size="13pt" fo:letter-spacing="normal" fo:font-style="normal" style:text-underline-style="none" fo:font-weight="bold" style:font-family-asian="Calibri" style:font-pitch-asian="fixed" style:font-size-asian="13pt" style:font-style-asian="normal" style:font-weight-asian="bold" style:font-family-complex="Calibri" style:font-family-generic-complex="swiss" style:font-size-complex="13pt" style:font-style-complex="normal" style:font-weight-complex="bold"/>
    </style:style>
    <style:style style:name="T27" style:family="text">
      <style:text-properties fo:color="#00cccc" style:text-line-through-style="none" fo:font-family="Cambria" style:font-family-generic="swiss" fo:font-size="34pt" fo:letter-spacing="normal" fo:font-style="normal" style:text-underline-style="none" fo:font-weight="bold" style:font-family-asian="Cambria" style:font-pitch-asian="fixed" style:font-size-asian="34pt" style:font-style-asian="normal" style:font-weight-asian="bold" style:font-family-complex="Cambria" style:font-family-generic-complex="swiss" style:font-size-complex="34pt" style:font-style-complex="normal" style:font-weight-complex="bold"/>
    </style:style>
    <style:style style:name="T28" style:family="text">
      <style:text-properties fo:color="#ffffff" style:text-line-through-style="none" fo:font-family="Calibri" style:font-family-generic="swiss" fo:font-size="10.5pt" fo:letter-spacing="normal" fo:font-style="normal" style:text-underline-style="none" fo:font-weight="normal" style:font-family-asian="Calibri" style:font-pitch-asian="fixed" style:font-size-asian="10.5pt" style:font-style-asian="normal" style:font-weight-asian="normal" style:font-family-complex="Calibri" style:font-family-generic-complex="swiss" style:font-size-complex="10.5pt" style:font-style-complex="normal" style:font-weight-complex="normal"/>
    </style:style>
    <style:style style:name="T29" style:family="text">
      <style:text-properties fo:color="#009999" style:text-line-through-style="none" fo:font-family="Calibri" style:font-family-generic="swiss" fo:font-size="12pt" fo:letter-spacing="normal" fo:font-style="normal" style:text-underline-style="none" fo:font-weight="bold" style:font-family-asian="Calibri" style:font-pitch-asian="fixed" style:font-size-asian="12pt" style:font-style-asian="normal" style:font-weight-asian="bold" style:font-family-complex="Calibri" style:font-family-generic-complex="swiss" style:font-size-complex="12pt" style:font-style-complex="normal" style:font-weight-complex="bold"/>
    </style:style>
    <style:style style:name="T30" style:family="text">
      <style:text-properties fo:color="#000000" style:text-line-through-style="none" fo:font-family="Calibri" style:font-family-generic="swiss" fo:font-size="12pt" fo:letter-spacing="normal" fo:font-style="normal" style:text-underline-style="none" fo:font-weight="bold" style:font-family-asian="Calibri" style:font-pitch-asian="fixed" style:font-size-asian="12pt" style:font-style-asian="normal" style:font-weight-asian="bold" style:font-family-complex="Calibri" style:font-family-generic-complex="swiss" style:font-size-complex="12pt" style:font-style-complex="normal" style:font-weight-complex="bold"/>
    </style:style>
    <style:style style:name="T31" style:family="text">
      <style:text-properties fo:color="#ffffff" style:text-line-through-style="none" fo:font-family="Calibri" style:font-family-generic="swiss" fo:font-size="12pt" fo:letter-spacing="normal" fo:font-style="normal" style:text-underline-style="none" fo:font-weight="normal" style:font-family-asian="Calibri" style:font-pitch-asian="fixed" style:font-size-asian="12pt" style:font-style-asian="normal" style:font-weight-asian="normal" style:font-family-complex="Calibri" style:font-family-generic-complex="swiss" style:font-size-complex="12pt" style:font-style-complex="normal" style:font-weight-complex="normal"/>
    </style:style>
    <style:style style:name="T32" style:family="text">
      <style:text-properties fo:color="#ffffff" style:text-line-through-style="none" fo:font-family="Calibri" style:font-family-generic="swiss" fo:font-size="9pt" fo:letter-spacing="normal" fo:font-style="normal" style:text-underline-style="none" fo:font-weight="normal" style:font-family-asian="Calibri" style:font-pitch-asian="fixed" style:font-size-asian="9pt" style:font-style-asian="normal" style:font-weight-asian="normal" style:font-family-complex="Calibri" style:font-family-generic-complex="swiss" style:font-size-complex="9pt" style:font-style-complex="normal" style:font-weight-complex="normal"/>
    </style:style>
    <style:style style:name="T33" style:family="text">
      <style:text-properties fo:color="#000000" style:text-line-through-style="none" fo:font-family="Cambria" style:font-family-generic="swiss" fo:font-size="29pt" fo:letter-spacing="normal" fo:font-style="normal" style:text-underline-style="none" fo:font-weight="bold" style:font-family-asian="Cambria" style:font-pitch-asian="fixed" style:font-size-asian="29pt" style:font-style-asian="normal" style:font-weight-asian="bold" style:font-family-complex="Cambria" style:font-family-generic-complex="swiss" style:font-size-complex="29pt" style:font-style-complex="normal" style:font-weight-complex="bold"/>
    </style:style>
    <style:style style:name="T34" style:family="text">
      <style:text-properties fo:color="#000000" style:text-line-through-style="none" fo:font-family="Cambria" style:font-family-generic="swiss" fo:font-size="30pt" fo:letter-spacing="normal" fo:font-style="normal" style:text-underline-style="none" fo:font-weight="bold" style:font-family-asian="Cambria" style:font-pitch-asian="fixed" style:font-size-asian="30pt" style:font-style-asian="normal" style:font-weight-asian="bold" style:font-family-complex="Cambria" style:font-family-generic-complex="swiss" style:font-size-complex="30pt" style:font-style-complex="normal" style:font-weight-complex="bold"/>
    </style:style>
    <style:style style:name="T35" style:family="text">
      <style:text-properties fo:color="#ffffff" style:text-line-through-style="none" fo:font-family="Cambria" style:font-family-generic="swiss" fo:font-size="15pt" fo:letter-spacing="normal" fo:font-style="normal" style:text-underline-style="none" fo:font-weight="bold" style:font-family-asian="Cambria" style:font-pitch-asian="fixed" style:font-size-asian="15pt" style:font-style-asian="normal" style:font-weight-asian="bold" style:font-family-complex="Cambria" style:font-family-generic-complex="swiss" style:font-size-complex="15pt" style:font-style-complex="normal" style:font-weight-complex="bold"/>
    </style:style>
    <style:style style:name="T36" style:family="text">
      <style:text-properties fo:color="#ffffff" style:text-line-through-style="none" fo:font-family="Calibri" style:font-family-generic="swiss" fo:font-size="11.5pt" fo:letter-spacing="normal" fo:font-style="normal" style:text-underline-style="none" fo:font-weight="normal" style:font-family-asian="Calibri" style:font-pitch-asian="fixed" style:font-size-asian="11.5pt" style:font-style-asian="normal" style:font-weight-asian="normal" style:font-family-complex="Calibri" style:font-family-generic-complex="swiss" style:font-size-complex="11.5pt" style:font-style-complex="normal" style:font-weight-complex="normal"/>
    </style:style>
    <text:list-style style:name="L1">
      <text:list-level-style-number text:level="1" style:num-format="">
        <style:list-level-properties text:min-label-width="0.6cm"/>
        <style:text-properties fo:color="#21c7a8"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fc3d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cbd5e1"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1c7293"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1e293b"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b1f3a"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64748b"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e2e8f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d7a63"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 1" draw:style-name="dp1" draw:master-page-name="Predefinito">
        <draw:custom-shape draw:name="Shape 0" draw:style-name="gr1" draw:text-style-name="P1" draw:layer="layout" svg:width="10.667cm" svg:height="10.667cm" svg:x="19.558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Shape 1" draw:style-name="gr2" draw:text-style-name="P1" draw:layer="layout" svg:width="7.619cm" svg:height="7.619cm" svg:x="21.082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Shape 2" draw:style-name="gr3" draw:text-style-name="P1" draw:layer="layout" svg:width="2.285cm" svg:height="2.285cm" svg:x="1.778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0" draw:style-name="gr4" draw:text-style-name="P2" draw:layer="layout" svg:width="1.188cm" svg:height="1.188cm" svg:x="2.327cm" svg:y="2.2cm">
          <draw:image xlink:href="Pictures/10000201000001000000010044CB969B.png" xlink:type="simple" xlink:show="embed" xlink:actuate="onLoad">
            <text:p/>
          </draw:image>
        </draw:frame>
        <draw:custom-shape draw:name="Text 3" draw:style-name="gr5" draw:text-style-name="P4" draw:layer="layout" svg:width="20.319cm" svg:height="1.015cm" svg:x="1.651cm" svg:y="4.318cm">
          <text:p text:style-name="P3"><text:span text:style-name="T1">DREAMERV4</text:span></text:p>
          <draw:enhanced-geometry svg:viewBox="0 0 21600 21600" draw:type="rectangle" draw:enhanced-path="M 0 0 L 21600 0 21600 21600 0 21600 0 0 Z N"/>
        </draw:custom-shape>
        <draw:custom-shape draw:name="Text 4" draw:style-name="gr6" draw:text-style-name="P6" draw:layer="layout" svg:width="21.843cm" svg:height="4.317cm" svg:x="1.651cm" svg:y="5.207cm">
          <text:p text:style-name="P5"><text:span text:style-name="T2">Training Agents Inside of</text:span></text:p>
          <text:p text:style-name="P5"><text:span text:style-name="T2">Scalable World Models</text:span></text:p>
          <draw:enhanced-geometry svg:viewBox="0 0 21600 21600" draw:type="rectangle" draw:enhanced-path="M 0 0 L 21600 0 21600 21600 0 21600 0 0 Z N"/>
        </draw:custom-shape>
        <draw:custom-shape draw:name="Text 5" draw:style-name="gr5" draw:text-style-name="P8" draw:layer="layout" svg:width="20.319cm" svg:height="1.142cm" svg:x="1.651cm" svg:y="9.271cm">
          <text:p text:style-name="P7"><text:span text:style-name="T3">Paper Presentation and Practical Code Analysis</text:span></text:p>
          <draw:enhanced-geometry svg:viewBox="0 0 21600 21600" draw:type="rectangle" draw:enhanced-path="M 0 0 L 21600 0 21600 21600 0 21600 0 0 Z N"/>
        </draw:custom-shape>
        <draw:custom-shape draw:name="Text 6" draw:style-name="gr5" draw:text-style-name="P8" draw:layer="layout" svg:width="15.239cm" svg:height="1.777cm" svg:x="1.651cm" svg:y="11.684cm">
          <text:p text:style-name="P9"><text:span text:style-name="T4">Marco Equisetto (VR535007)</text:span></text:p>
          <text:p text:style-name="P9"><text:span text:style-name="T5">Reinforcement Learning Course</text:span></text:p>
          <draw:enhanced-geometry svg:viewBox="0 0 21600 21600" draw:type="rectangle" draw:enhanced-path="M 0 0 L 21600 0 21600 21600 0 21600 0 0 Z N"/>
        </draw:custom-shape>
        <draw:frame draw:style-name="gr7" draw:text-style-name="P10" draw:layer="layout" svg:width="4.941cm" svg:height="1.779cm" svg:x="19.859cm" svg:y="11.8cm">
          <draw:image xlink:href="Pictures/1000020100000320000001203D5EA84A.png" xlink:type="simple" xlink:show="embed" xlink:actuate="onLoad">
            <text:p/>
          </draw:image>
        </draw:frame>
        <presentation:notes draw:style-name="dp2">
          <draw:page-thumbnail draw:name="Slide Image Placeholder 1" draw:style-name="gr8" draw:layer="layout" svg:width="15.239cm" svg:height="8.572cm" svg:x="1.905cm" svg:y="3.175cm" draw:page-number="1" presentation:class="page"/>
          <draw:frame draw:name="Notes Placeholder 2" presentation:style-name="pr1" draw:text-style-name="P11" draw:layer="layout" svg:width="15.239cm" svg:height="10cm" svg:x="1.905cm" svg:y="12.224cm" presentation:class="notes" presentation:user-transformed="true">
            <draw:text-box>
              <text:p><text:span text:style-name="T6">Good morning/afternoon everyone. Today we're presenting DreamerV4, a paper titled 'Training Agents Inside of Scalable World Models.' We'll split this into two halves: first, the theoretical methodology behind the paper, and second, a hands-on code analysis with a live demo of the PyTorch implementation. Let's get started.</text:span></text:p>
            </draw:text-box>
          </draw:frame>
          <draw:frame draw:name="Slide Number Placeholder 3" presentation:style-name="pr2" draw:text-style-name="P13" draw:layer="layout" svg:width="8.254cm" svg:height="1.273cm" svg:x="10.791cm" svg:y="24.126cm" presentation:class="page-number" presentation:user-transformed="true">
            <draw:text-box>
              <text:p text:style-name="P12"><text:span text:style-name="T7"><text:page-number>&lt;numero&gt;</text:page-number></text:span></text:p>
            </draw:text-box>
          </draw:frame>
        </presentation:notes>
      </draw:page>
      <draw:page draw:name="Slide 2" draw:style-name="dp3" draw:master-page-name="Predefinito">
        <draw:custom-shape draw:name="Text 0" draw:style-name="gr5" draw:text-style-name="P15" draw:layer="layout" svg:width="15.239cm" svg:height="0.761cm" svg:x="1.27cm" svg:y="0.813cm">
          <text:p text:style-name="P14"><text:span text:style-name="T8">METHODOLOGY</text:span></text:p>
          <draw:enhanced-geometry svg:viewBox="0 0 21600 21600" draw:type="rectangle" draw:enhanced-path="M 0 0 L 21600 0 21600 21600 0 21600 0 0 Z N"/>
        </draw:custom-shape>
        <draw:custom-shape draw:name="Text 1" draw:style-name="gr5" draw:text-style-name="P11" draw:layer="layout" svg:width="22.859cm" svg:height="1.777cm" svg:x="1.27cm" svg:y="1.524cm">
          <text:p text:style-name="P16"><text:span text:style-name="T9">The World Model Paradigm</text:span></text:p>
          <draw:enhanced-geometry svg:viewBox="0 0 21600 21600" draw:type="rectangle" draw:enhanced-path="M 0 0 L 21600 0 21600 21600 0 21600 0 0 Z N"/>
        </draw:custom-shape>
        <draw:custom-shape draw:name="Shape 2" draw:style-name="gr9" draw:text-style-name="P1" draw:layer="layout" svg:width="22.859cm" svg:height="2.539cm" svg:x="1.27cm" svg:y="4.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3" draw:style-name="gr10" draw:text-style-name="P1" draw:layer="layout" svg:width="1.777cm" svg:height="1.777cm" svg:x="1.829cm" svg:y="4.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0" draw:style-name="gr4" draw:text-style-name="P2" draw:layer="layout" svg:width="0.924cm" svg:height="0.924cm" svg:x="2.256cm" svg:y="4.973cm">
          <draw:image xlink:href="Pictures/100002010000010000000100A6128726.png" xlink:type="simple" xlink:show="embed" xlink:actuate="onLoad">
            <text:p/>
          </draw:image>
        </draw:frame>
        <draw:custom-shape draw:name="Text 4" draw:style-name="gr5" draw:text-style-name="P11" draw:layer="layout" svg:width="19.303cm" svg:height="0.888cm" svg:x="4.191cm" svg:y="4.445cm">
          <text:p text:style-name="P16"><text:span text:style-name="T10">The Bottleneck</text:span></text:p>
          <draw:enhanced-geometry svg:viewBox="0 0 21600 21600" draw:type="rectangle" draw:enhanced-path="M 0 0 L 21600 0 21600 21600 0 21600 0 0 Z N"/>
        </draw:custom-shape>
        <draw:custom-shape draw:name="Text 5" draw:style-name="gr5" draw:text-style-name="P11" draw:layer="layout" svg:width="19.557cm" svg:height="1.396cm" svg:x="4.191cm" svg:y="5.258cm">
          <text:p text:style-name="P17"><text:span text:style-name="T11">Standard RL requires millions of real-world interactions (slow, expensive, and unsafe for physical robots).</text:span></text:p>
          <draw:enhanced-geometry svg:viewBox="0 0 21600 21600" draw:type="rectangle" draw:enhanced-path="M 0 0 L 21600 0 21600 21600 0 21600 0 0 Z N"/>
        </draw:custom-shape>
        <draw:custom-shape draw:name="Shape 6" draw:style-name="gr9" draw:text-style-name="P1" draw:layer="layout" svg:width="22.859cm" svg:height="2.539cm" svg:x="1.27cm" svg:y="7.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7" draw:style-name="gr10" draw:text-style-name="P1" draw:layer="layout" svg:width="1.777cm" svg:height="1.777cm" svg:x="1.829cm" svg:y="7.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1" draw:style-name="gr4" draw:text-style-name="P2" draw:layer="layout" svg:width="0.924cm" svg:height="0.924cm" svg:x="2.256cm" svg:y="7.971cm">
          <draw:image xlink:href="Pictures/10000201000001000000010044CB969B.png" xlink:type="simple" xlink:show="embed" xlink:actuate="onLoad">
            <text:p/>
          </draw:image>
        </draw:frame>
        <draw:custom-shape draw:name="Text 8" draw:style-name="gr5" draw:text-style-name="P11" draw:layer="layout" svg:width="19.303cm" svg:height="0.888cm" svg:x="4.191cm" svg:y="7.442cm">
          <text:p text:style-name="P16"><text:span text:style-name="T10">The Solution</text:span></text:p>
          <draw:enhanced-geometry svg:viewBox="0 0 21600 21600" draw:type="rectangle" draw:enhanced-path="M 0 0 L 21600 0 21600 21600 0 21600 0 0 Z N"/>
        </draw:custom-shape>
        <draw:custom-shape draw:name="Text 9" draw:style-name="gr5" draw:text-style-name="P11" draw:layer="layout" svg:width="19.557cm" svg:height="1.396cm" svg:x="4.191cm" svg:y="8.255cm">
          <text:p text:style-name="P17"><text:span text:style-name="T11">Train a “World Model” to simulate the environment. The agent learns optimal policies entirely in its own “imagination.”</text:span></text:p>
          <draw:enhanced-geometry svg:viewBox="0 0 21600 21600" draw:type="rectangle" draw:enhanced-path="M 0 0 L 21600 0 21600 21600 0 21600 0 0 Z N"/>
        </draw:custom-shape>
        <draw:custom-shape draw:name="Shape 10" draw:style-name="gr9" draw:text-style-name="P1" draw:layer="layout" svg:width="22.859cm" svg:height="2.539cm" svg:x="1.27cm" svg:y="10.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1" draw:style-name="gr10" draw:text-style-name="P1" draw:layer="layout" svg:width="1.777cm" svg:height="1.777cm" svg:x="1.829cm" svg:y="10.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2" draw:style-name="gr4" draw:text-style-name="P2" draw:layer="layout" svg:width="0.924cm" svg:height="0.924cm" svg:x="2.256cm" svg:y="10.968cm">
          <draw:image xlink:href="Pictures/1000020100000100000001005DC1394D.png" xlink:type="simple" xlink:show="embed" xlink:actuate="onLoad">
            <text:p/>
          </draw:image>
        </draw:frame>
        <draw:custom-shape draw:name="Text 12" draw:style-name="gr5" draw:text-style-name="P11" draw:layer="layout" svg:width="19.303cm" svg:height="0.888cm" svg:x="4.191cm" svg:y="10.439cm">
          <text:p text:style-name="P16"><text:span text:style-name="T10">DreamerV4 Innovation</text:span></text:p>
          <draw:enhanced-geometry svg:viewBox="0 0 21600 21600" draw:type="rectangle" draw:enhanced-path="M 0 0 L 21600 0 21600 21600 0 21600 0 0 Z N"/>
        </draw:custom-shape>
        <draw:custom-shape draw:name="Text 13" draw:style-name="gr5" draw:text-style-name="P11" draw:layer="layout" svg:width="19.557cm" svg:height="1.396cm" svg:x="4.191cm" svg:y="11.252cm">
          <text:p text:style-name="P17"><text:span text:style-name="T11">Replaces Recurrent State Space Models (RSSM) with massively scalable Block-Causal Transformers, the same architecture family behind modern LLMs.</text:span></text:p>
          <draw:enhanced-geometry svg:viewBox="0 0 21600 21600" draw:type="rectangle" draw:enhanced-path="M 0 0 L 21600 0 21600 21600 0 21600 0 0 Z N"/>
        </draw:custom-shape>
        <draw:custom-shape draw:name="Text 14" draw:style-name="gr5" draw:text-style-name="P11" draw:layer="layout" svg:width="15.239cm" svg:height="0.634cm" svg:x="1.27cm" svg:y="13.513cm">
          <text:p/>
          <draw:enhanced-geometry svg:viewBox="0 0 21600 21600" draw:type="rectangle" draw:enhanced-path="M 0 0 L 21600 0 21600 21600 0 21600 0 0 Z N"/>
        </draw:custom-shape>
        <draw:custom-shape draw:name="Text 15" draw:style-name="gr5" draw:text-style-name="P11" draw:layer="layout" svg:width="1.015cm" svg:height="0.634cm" svg:x="23.368cm" svg:y="13.513cm">
          <text:p text:style-name="P18"><text:span text:style-name="T12">2</text:span></text:p>
          <draw:enhanced-geometry svg:viewBox="0 0 21600 21600" draw:type="rectangle" draw:enhanced-path="M 0 0 L 21600 0 21600 21600 0 21600 0 0 Z N"/>
        </draw:custom-shape>
        <presentation:notes draw:style-name="dp2">
          <draw:page-thumbnail draw:name="Slide Image Placeholder 1" draw:style-name="gr8" draw:layer="layout" svg:width="15.239cm" svg:height="8.572cm" svg:x="1.905cm" svg:y="3.175cm" draw:page-number="2" presentation:class="page"/>
          <draw:frame draw:name="Notes Placeholder 2" presentation:style-name="pr1" draw:text-style-name="P11" draw:layer="layout" svg:width="15.239cm" svg:height="10cm" svg:x="1.905cm" svg:y="12.224cm" presentation:class="notes" presentation:user-transformed="true">
            <draw:text-box>
              <text:p><text:span text:style-name="T6">Let's start with the core problem DreamerV4 is solving. Standard reinforcement learning algorithms are incredibly data-hungry -- they often need millions of interactions with the real environment to learn anything useful. If you're training a physical robot, that's not just slow and expensive, it's actually dangerous -- you can't let a robot arm fail a few million times to learn not to crash into things. The solution that Dreamer-style algorithms propose is to train a 'World Model' -- essentially a learned simulator of the environment. Once you have this simulator, the agent can practice and learn its policy entirely inside its own imagination, without touching the real world at all. What's new in DreamerV4 specifically is the backbone architecture. Earlier Dreamer versions used Recurrent State Space Models, or RSSMs -- these are recurrent, sequential networks. DreamerV4 throws that out and replaces it with Block-Causal Transformers -- architecturally very similar to what powers large language models today. This means DreamerV4 can inherit all the scalability tricks the LLM community has developed over the past few years.</text:span></text:p>
            </draw:text-box>
          </draw:frame>
          <draw:frame draw:name="Slide Number Placeholder 3" presentation:style-name="pr2" draw:text-style-name="P13" draw:layer="layout" svg:width="8.254cm" svg:height="1.273cm" svg:x="10.791cm" svg:y="24.126cm" presentation:class="page-number" presentation:user-transformed="true">
            <draw:text-box>
              <text:p text:style-name="P12"><text:span text:style-name="T7"><text:page-number>&lt;numero&gt;</text:page-number></text:span></text:p>
            </draw:text-box>
          </draw:frame>
        </presentation:notes>
      </draw:page>
      <draw:page draw:name="Slide 3" draw:style-name="dp3" draw:master-page-name="Predefinito">
        <draw:custom-shape draw:name="Text 0" draw:style-name="gr5" draw:text-style-name="P11" draw:layer="layout" svg:width="15.239cm" svg:height="0.761cm" svg:x="1.27cm" svg:y="0.813cm">
          <text:p/>
          <draw:enhanced-geometry svg:viewBox="0 0 21600 21600" draw:type="rectangle" draw:enhanced-path="M 0 0 L 21600 0 21600 21600 0 21600 0 0 Z N"/>
        </draw:custom-shape>
        <draw:custom-shape draw:name="Text 1" draw:style-name="gr5" draw:text-style-name="P11" draw:layer="layout" svg:width="22.859cm" svg:height="1.777cm" svg:x="1.27cm" svg:y="1.524cm">
          <text:p text:style-name="P16"><text:span text:style-name="T9">Architecture: The Tokenizer</text:span></text:p>
          <draw:enhanced-geometry svg:viewBox="0 0 21600 21600" draw:type="rectangle" draw:enhanced-path="M 0 0 L 21600 0 21600 21600 0 21600 0 0 Z N"/>
        </draw:custom-shape>
        <draw:custom-shape draw:name="Text 2" draw:style-name="gr5" draw:text-style-name="P11" draw:layer="layout" svg:width="13.461cm" svg:height="0.761cm" svg:x="1.27cm" svg:y="3.937cm">
          <text:p text:style-name="P16"><text:span text:style-name="T13">Objective</text:span></text:p>
          <draw:enhanced-geometry svg:viewBox="0 0 21600 21600" draw:type="rectangle" draw:enhanced-path="M 0 0 L 21600 0 21600 21600 0 21600 0 0 Z N"/>
        </draw:custom-shape>
        <draw:custom-shape draw:name="Text 3" draw:style-name="gr5" draw:text-style-name="P11" draw:layer="layout" svg:width="13.461cm" svg:height="1.396cm" svg:x="1.27cm" svg:y="4.699cm">
          <text:p text:style-name="P16"><text:span text:style-name="T14">Compress high-dimensional pixels into a compact sequence of latent vectors.</text:span></text:p>
          <draw:enhanced-geometry svg:viewBox="0 0 21600 21600" draw:type="rectangle" draw:enhanced-path="M 0 0 L 21600 0 21600 21600 0 21600 0 0 Z N"/>
        </draw:custom-shape>
        <draw:custom-shape draw:name="Text 4" draw:style-name="gr5" draw:text-style-name="P11" draw:layer="layout" svg:width="13.461cm" svg:height="0.761cm" svg:x="1.27cm" svg:y="6.223cm">
          <text:p text:style-name="P16"><text:span text:style-name="T13">Mechanism</text:span></text:p>
          <draw:enhanced-geometry svg:viewBox="0 0 21600 21600" draw:type="rectangle" draw:enhanced-path="M 0 0 L 21600 0 21600 21600 0 21600 0 0 Z N"/>
        </draw:custom-shape>
        <draw:custom-shape draw:name="Text 5" draw:style-name="gr5" draw:text-style-name="P11" draw:layer="layout" svg:width="13.461cm" svg:height="1.396cm" svg:x="1.27cm" svg:y="6.985cm">
          <text:p text:style-name="P16"><text:span text:style-name="T14">Masked Autoencoders (MAE): randomly hide up to 90% of image patches during training.</text:span></text:p>
          <draw:enhanced-geometry svg:viewBox="0 0 21600 21600" draw:type="rectangle" draw:enhanced-path="M 0 0 L 21600 0 21600 21600 0 21600 0 0 Z N"/>
        </draw:custom-shape>
        <draw:custom-shape draw:name="Shape 6" draw:style-name="gr11" draw:text-style-name="P1" draw:layer="layout" svg:width="13.461cm" svg:height="3.936cm" svg:x="1.27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7" draw:style-name="gr5" draw:text-style-name="P20" draw:layer="layout" svg:width="12.191cm" svg:height="0.761cm" svg:x="1.905cm" svg:y="9.271cm">
          <text:p text:style-name="P19"><text:span text:style-name="T15">Why it matters</text:span></text:p>
          <draw:enhanced-geometry svg:viewBox="0 0 21600 21600" draw:type="rectangle" draw:enhanced-path="M 0 0 L 21600 0 21600 21600 0 21600 0 0 Z N"/>
        </draw:custom-shape>
        <draw:custom-shape draw:name="Text 8" draw:style-name="gr5" draw:text-style-name="P22" draw:layer="layout" svg:width="12.191cm" svg:height="2.539cm" svg:x="1.905cm" svg:y="10.084cm">
          <text:p text:style-name="P21"><text:span text:style-name="T16">Forces the encoder to learn robust semantic features (not just pixel compression) so the model understands the scene instead of memorizing it.</text:span></text:p>
          <draw:enhanced-geometry svg:viewBox="0 0 21600 21600" draw:type="rectangle" draw:enhanced-path="M 0 0 L 21600 0 21600 21600 0 21600 0 0 Z N"/>
        </draw:custom-shape>
        <draw:custom-shape draw:name="Shape 9" draw:style-name="gr12" draw:text-style-name="P1" draw:layer="layout" svg:width="1.574cm" svg:height="1.574cm" svg:x="16.548cm" svg:y="3.6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0" draw:style-name="gr13" draw:text-style-name="P1" draw:layer="layout" svg:width="1.574cm" svg:height="1.574cm" svg:x="18.326cm" svg:y="3.6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1" draw:style-name="gr13" draw:text-style-name="P1" draw:layer="layout" svg:width="1.574cm" svg:height="1.574cm" svg:x="20.104cm" svg:y="3.6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2" draw:style-name="gr12" draw:text-style-name="P1" draw:layer="layout" svg:width="1.574cm" svg:height="1.574cm" svg:x="21.882cm" svg:y="3.6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3" draw:style-name="gr13" draw:text-style-name="P1" draw:layer="layout" svg:width="1.574cm" svg:height="1.574cm" svg:x="16.548cm" svg:y="5.4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4" draw:style-name="gr12" draw:text-style-name="P1" draw:layer="layout" svg:width="1.574cm" svg:height="1.574cm" svg:x="18.326cm" svg:y="5.4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5" draw:style-name="gr13" draw:text-style-name="P1" draw:layer="layout" svg:width="1.574cm" svg:height="1.574cm" svg:x="20.104cm" svg:y="5.4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6" draw:style-name="gr13" draw:text-style-name="P1" draw:layer="layout" svg:width="1.574cm" svg:height="1.574cm" svg:x="21.882cm" svg:y="5.4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7" draw:style-name="gr12" draw:text-style-name="P1" draw:layer="layout" svg:width="1.574cm" svg:height="1.574cm" svg:x="16.548cm" svg:y="7.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8" draw:style-name="gr13" draw:text-style-name="P1" draw:layer="layout" svg:width="1.574cm" svg:height="1.574cm" svg:x="18.326cm" svg:y="7.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9" draw:style-name="gr12" draw:text-style-name="P1" draw:layer="layout" svg:width="1.574cm" svg:height="1.574cm" svg:x="20.104cm" svg:y="7.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20" draw:style-name="gr13" draw:text-style-name="P1" draw:layer="layout" svg:width="1.574cm" svg:height="1.574cm" svg:x="21.882cm" svg:y="7.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21" draw:style-name="gr13" draw:text-style-name="P1" draw:layer="layout" svg:width="1.574cm" svg:height="1.574cm" svg:x="16.548cm" svg:y="9.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22" draw:style-name="gr13" draw:text-style-name="P1" draw:layer="layout" svg:width="1.574cm" svg:height="1.574cm" svg:x="18.326cm" svg:y="9.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23" draw:style-name="gr12" draw:text-style-name="P1" draw:layer="layout" svg:width="1.574cm" svg:height="1.574cm" svg:x="20.104cm" svg:y="9.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24" draw:style-name="gr13" draw:text-style-name="P1" draw:layer="layout" svg:width="1.574cm" svg:height="1.574cm" svg:x="21.882cm" svg:y="9.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25" draw:style-name="gr14" draw:text-style-name="P23" draw:layer="layout" svg:width="7.452cm" svg:height="1.269cm" svg:x="16.348cm" svg:y="10.43cm">
          <text:p text:style-name="P17"><text:span text:style-name="T17">Visible patch tokens (teal) vs. masked patches (gray)</text:span></text:p>
          <draw:enhanced-geometry svg:viewBox="0 0 21600 21600" draw:type="rectangle" draw:enhanced-path="M 0 0 L 21600 0 21600 21600 0 21600 0 0 Z N"/>
        </draw:custom-shape>
        <draw:custom-shape draw:name="Text 26" draw:style-name="gr5" draw:text-style-name="P11" draw:layer="layout" svg:width="15.239cm" svg:height="0.634cm" svg:x="1.27cm" svg:y="13.513cm">
          <text:p/>
          <draw:enhanced-geometry svg:viewBox="0 0 21600 21600" draw:type="rectangle" draw:enhanced-path="M 0 0 L 21600 0 21600 21600 0 21600 0 0 Z N"/>
        </draw:custom-shape>
        <draw:custom-shape draw:name="Text 27" draw:style-name="gr5" draw:text-style-name="P11" draw:layer="layout" svg:width="1.015cm" svg:height="0.634cm" svg:x="23.368cm" svg:y="13.513cm">
          <text:p text:style-name="P18"><text:span text:style-name="T12">3</text:span></text:p>
          <draw:enhanced-geometry svg:viewBox="0 0 21600 21600" draw:type="rectangle" draw:enhanced-path="M 0 0 L 21600 0 21600 21600 0 21600 0 0 Z N"/>
        </draw:custom-shape>
        <draw:custom-shape draw:name="Text 0" draw:style-name="gr15" draw:text-style-name="P24" draw:layer="layout" svg:width="15.239cm" svg:height="0.761cm" svg:x="1.27cm" svg:y="0.813cm">
          <text:p text:style-name="P14"><text:span text:style-name="T8">METHODOLOGY</text:span></text:p>
          <draw:enhanced-geometry svg:viewBox="0 0 21600 21600" draw:type="rectangle" draw:enhanced-path="M 0 0 L 21600 0 21600 21600 0 21600 0 0 Z N"/>
        </draw:custom-shape>
        <presentation:notes draw:style-name="dp2">
          <draw:page-thumbnail draw:name="Slide Image Placeholder 1" draw:style-name="gr8" draw:layer="layout" svg:width="15.239cm" svg:height="8.572cm" svg:x="1.905cm" svg:y="3.175cm" draw:page-number="3" presentation:class="page"/>
          <draw:frame draw:name="Notes Placeholder 2" presentation:style-name="pr1" draw:text-style-name="P11" draw:layer="layout" svg:width="15.239cm" svg:height="10cm" svg:x="1.905cm" svg:y="12.224cm" presentation:class="notes" presentation:user-transformed="true">
            <draw:text-box>
              <text:p><text:span text:style-name="T6">Now let's dig into the architecture, starting with the tokenizer. Its job is to take a raw, high-dimensional image -- pixels -- and compress it down into a compact sequence of latent vectors that the rest of the model can work with efficiently. The key mechanism here is the Masked Autoencoder, or MAE. During training, the model randomly hides up to 90% of the image patches -- that's a huge fraction -- and then has to reconstruct or represent the scene from what's left. Here's why this matters, and this is worth emphasizing: without this masking strategy, the model could take the lazy route and just memorize pixel patterns -- essentially becoming a fancy compression algorithm. But because 90% of the information is hidden during training, the encoder is forced to learn robust, semantic features -- it has to actually understand what's in the scene, not just how to reproduce it. That semantic understanding is what makes the downstream world model actually useful for planning, rather than just being a lossy video codec.</text:span></text:p>
            </draw:text-box>
          </draw:frame>
          <draw:frame draw:name="Slide Number Placeholder 3" presentation:style-name="pr2" draw:text-style-name="P13" draw:layer="layout" svg:width="8.254cm" svg:height="1.273cm" svg:x="10.791cm" svg:y="24.126cm" presentation:class="page-number" presentation:user-transformed="true">
            <draw:text-box>
              <text:p text:style-name="P12"><text:span text:style-name="T7"><text:page-number>&lt;numero&gt;</text:page-number></text:span></text:p>
            </draw:text-box>
          </draw:frame>
        </presentation:notes>
      </draw:page>
      <draw:page draw:name="Slide 4" draw:style-name="dp3" draw:master-page-name="Predefinito">
        <draw:custom-shape draw:name="Text 0" draw:style-name="gr5" draw:text-style-name="P11" draw:layer="layout" svg:width="15.239cm" svg:height="0.761cm" svg:x="1.27cm" svg:y="0.813cm">
          <text:p/>
          <draw:enhanced-geometry svg:viewBox="0 0 21600 21600" draw:type="rectangle" draw:enhanced-path="M 0 0 L 21600 0 21600 21600 0 21600 0 0 Z N"/>
        </draw:custom-shape>
        <draw:custom-shape draw:name="Text 1" draw:style-name="gr5" draw:text-style-name="P11" draw:layer="layout" svg:width="22.859cm" svg:height="1.777cm" svg:x="1.27cm" svg:y="1.524cm">
          <text:p text:style-name="P16"><text:span text:style-name="T9">Architecture: The Dynamics Model</text:span></text:p>
          <draw:enhanced-geometry svg:viewBox="0 0 21600 21600" draw:type="rectangle" draw:enhanced-path="M 0 0 L 21600 0 21600 21600 0 21600 0 0 Z N"/>
        </draw:custom-shape>
        <draw:custom-shape draw:name="Text 2" draw:style-name="gr5" draw:text-style-name="P11" draw:layer="layout" svg:width="22.859cm" svg:height="0.761cm" svg:x="1.27cm" svg:y="3.937cm">
          <text:p text:style-name="P16"><text:span text:style-name="T13">Objective: </text:span><text:span text:style-name="T14">Predict future latent states given past states and the agent’s continuous actions.</text:span></text:p>
          <draw:enhanced-geometry svg:viewBox="0 0 21600 21600" draw:type="rectangle" draw:enhanced-path="M 0 0 L 21600 0 21600 21600 0 21600 0 0 Z N"/>
        </draw:custom-shape>
        <draw:custom-shape draw:name="Text 3" draw:style-name="gr5" draw:text-style-name="P11" draw:layer="layout" svg:width="22.859cm" svg:height="1.015cm" svg:x="1.27cm" svg:y="4.699cm">
          <text:p/>
          <draw:enhanced-geometry svg:viewBox="0 0 21600 21600" draw:type="rectangle" draw:enhanced-path="M 0 0 L 21600 0 21600 21600 0 21600 0 0 Z N"/>
        </draw:custom-shape>
        <draw:custom-shape draw:name="Text 4" draw:style-name="gr5" draw:text-style-name="P11" draw:layer="layout" svg:width="12.699cm" svg:height="0.71cm" svg:x="1.27cm" svg:y="5.164cm">
          <text:p text:style-name="P16"><text:span text:style-name="T18">Old approach: step by step</text:span></text:p>
          <draw:enhanced-geometry svg:viewBox="0 0 21600 21600" draw:type="rectangle" draw:enhanced-path="M 0 0 L 21600 0 21600 21600 0 21600 0 0 Z N"/>
        </draw:custom-shape>
        <draw:custom-shape draw:name="Shape 5" draw:style-name="gr16" draw:text-style-name="P1" draw:layer="layout" svg:width="1.269cm" svg:height="1.269cm" svg:x="1.27cm" svg:y="5.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6" draw:style-name="gr5" draw:text-style-name="P11" draw:layer="layout" svg:width="2.031cm" svg:height="0.634cm" svg:x="0.889cm" svg:y="6.333cm">
          <text:p text:style-name="P25"><text:span text:style-name="T12">t</text:span></text:p>
          <draw:enhanced-geometry svg:viewBox="0 0 21600 21600" draw:type="rectangle" draw:enhanced-path="M 0 0 L 21600 0 21600 21600 0 21600 0 0 Z N"/>
        </draw:custom-shape>
        <draw:line draw:name="Shape 7" draw:style-name="gr17" draw:text-style-name="P2" draw:layer="layout" svg:x1="2.54cm" svg:y1="6.612cm" svg:x2="4.14cm" svg:y2="6.612cm">
          <text:p/>
        </draw:line>
        <draw:custom-shape draw:name="Shape 8" draw:style-name="gr18" draw:text-style-name="P1" draw:layer="layout" svg:width="1.269cm" svg:height="1.269cm" svg:x="4.14cm" svg:y="5.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9" draw:style-name="gr5" draw:text-style-name="P11" draw:layer="layout" svg:width="2.031cm" svg:height="0.634cm" svg:x="3.759cm" svg:y="6.333cm">
          <text:p text:style-name="P25"><text:span text:style-name="T12">t+1</text:span></text:p>
          <draw:enhanced-geometry svg:viewBox="0 0 21600 21600" draw:type="rectangle" draw:enhanced-path="M 0 0 L 21600 0 21600 21600 0 21600 0 0 Z N"/>
        </draw:custom-shape>
        <draw:line draw:name="Shape 10" draw:style-name="gr17" draw:text-style-name="P2" draw:layer="layout" svg:x1="5.41cm" svg:y1="6.612cm" svg:x2="7.01cm" svg:y2="6.612cm">
          <text:p/>
        </draw:line>
        <draw:custom-shape draw:name="Shape 11" draw:style-name="gr18" draw:text-style-name="P1" draw:layer="layout" svg:width="1.269cm" svg:height="1.269cm" svg:x="7.01cm" svg:y="5.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12" draw:style-name="gr5" draw:text-style-name="P11" draw:layer="layout" svg:width="2.031cm" svg:height="0.634cm" svg:x="6.629cm" svg:y="6.333cm">
          <text:p text:style-name="P25"><text:span text:style-name="T12">t+2</text:span></text:p>
          <draw:enhanced-geometry svg:viewBox="0 0 21600 21600" draw:type="rectangle" draw:enhanced-path="M 0 0 L 21600 0 21600 21600 0 21600 0 0 Z N"/>
        </draw:custom-shape>
        <draw:line draw:name="Shape 13" draw:style-name="gr17" draw:text-style-name="P2" draw:layer="layout" svg:x1="8.28cm" svg:y1="6.612cm" svg:x2="9.88cm" svg:y2="6.612cm">
          <text:p/>
        </draw:line>
        <draw:custom-shape draw:name="Shape 14" draw:style-name="gr18" draw:text-style-name="P1" draw:layer="layout" svg:width="1.269cm" svg:height="1.269cm" svg:x="9.881cm" svg:y="5.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15" draw:style-name="gr5" draw:text-style-name="P11" draw:layer="layout" svg:width="2.031cm" svg:height="0.634cm" svg:x="9.5cm" svg:y="6.333cm">
          <text:p text:style-name="P25"><text:span text:style-name="T12">t+3</text:span></text:p>
          <draw:enhanced-geometry svg:viewBox="0 0 21600 21600" draw:type="rectangle" draw:enhanced-path="M 0 0 L 21600 0 21600 21600 0 21600 0 0 Z N"/>
        </draw:custom-shape>
        <draw:line draw:name="Shape 16" draw:style-name="gr17" draw:text-style-name="P2" draw:layer="layout" svg:x1="11.15cm" svg:y1="6.612cm" svg:x2="12.75cm" svg:y2="6.612cm">
          <text:p/>
        </draw:line>
        <draw:custom-shape draw:name="Shape 17" draw:style-name="gr18" draw:text-style-name="P1" draw:layer="layout" svg:width="1.269cm" svg:height="1.269cm" svg:x="12.751cm" svg:y="5.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18" draw:style-name="gr5" draw:text-style-name="P11" draw:layer="layout" svg:width="2.031cm" svg:height="0.634cm" svg:x="12.37cm" svg:y="6.333cm">
          <text:p text:style-name="P25"><text:span text:style-name="T12">t+4</text:span></text:p>
          <draw:enhanced-geometry svg:viewBox="0 0 21600 21600" draw:type="rectangle" draw:enhanced-path="M 0 0 L 21600 0 21600 21600 0 21600 0 0 Z N"/>
        </draw:custom-shape>
        <draw:custom-shape draw:name="Text 19" draw:style-name="gr19" draw:text-style-name="P26" draw:layer="layout" svg:width="9.33cm" svg:height="0.761cm" svg:x="14.67cm" svg:y="6.139cm">
          <text:p text:style-name="P16"><text:span text:style-name="T19">Sequential predictions</text:span><text:span text:style-name="T20">: errors compound over long horizons</text:span></text:p>
          <draw:enhanced-geometry svg:viewBox="0 0 21600 21600" draw:type="rectangle" draw:enhanced-path="M 0 0 L 21600 0 21600 21600 0 21600 0 0 Z N"/>
        </draw:custom-shape>
        <draw:custom-shape draw:name="Text 20" draw:style-name="gr5" draw:text-style-name="P20" draw:layer="layout" svg:width="12.699cm" svg:height="0.71cm" svg:x="1.27cm" svg:y="8.304cm">
          <text:p text:style-name="P19"><text:span text:style-name="T21">DreamerV4: Shortcut Forcing (τ)</text:span></text:p>
          <draw:enhanced-geometry svg:viewBox="0 0 21600 21600" draw:type="rectangle" draw:enhanced-path="M 0 0 L 21600 0 21600 21600 0 21600 0 0 Z N"/>
        </draw:custom-shape>
        <draw:custom-shape draw:name="Shape 21" draw:style-name="gr16" draw:text-style-name="P1" draw:layer="layout" svg:width="1.269cm" svg:height="1.269cm" svg:x="1.27cm" svg:y="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22" draw:style-name="gr5" draw:text-style-name="P11" draw:layer="layout" svg:width="2.031cm" svg:height="0.634cm" svg:x="0.889cm" svg:y="9.373cm">
          <text:p text:style-name="P25"><text:span text:style-name="T12">t</text:span></text:p>
          <draw:enhanced-geometry svg:viewBox="0 0 21600 21600" draw:type="rectangle" draw:enhanced-path="M 0 0 L 21600 0 21600 21600 0 21600 0 0 Z N"/>
        </draw:custom-shape>
        <draw:line draw:name="Shape 23" draw:style-name="gr20" draw:text-style-name="P2" draw:layer="layout" svg:x1="2.54cm" svg:y1="9.652cm" svg:x2="12.768cm" svg:y2="9.652cm">
          <text:p/>
        </draw:line>
        <draw:custom-shape draw:name="Shape 24" draw:style-name="gr21" draw:text-style-name="P1" draw:layer="layout" svg:width="1.269cm" svg:height="1.269cm" svg:x="12.768cm" svg:y="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25" draw:style-name="gr5" draw:text-style-name="P11" draw:layer="layout" svg:width="2.031cm" svg:height="0.634cm" svg:x="12.387cm" svg:y="9.373cm">
          <text:p text:style-name="P25"><text:span text:style-name="T22">t+k</text:span></text:p>
          <draw:enhanced-geometry svg:viewBox="0 0 21600 21600" draw:type="rectangle" draw:enhanced-path="M 0 0 L 21600 0 21600 21600 0 21600 0 0 Z N"/>
        </draw:custom-shape>
        <draw:custom-shape draw:name="Text 26" draw:style-name="gr22" draw:text-style-name="P26" draw:layer="layout" svg:width="9.73cm" svg:height="0.761cm" svg:x="14.618cm" svg:y="9.239cm">
          <text:p text:style-name="P16"><text:span text:style-name="T19">Direct jump to future state</text:span><text:span text:style-name="T20">: no compounding sequential error</text:span></text:p>
          <draw:enhanced-geometry svg:viewBox="0 0 21600 21600" draw:type="rectangle" draw:enhanced-path="M 0 0 L 21600 0 21600 21600 0 21600 0 0 Z N"/>
        </draw:custom-shape>
        <draw:custom-shape draw:name="Shape 27" draw:style-name="gr9" draw:text-style-name="P1" draw:layer="layout" svg:width="22.859cm" svg:height="1.574cm" svg:x="1.27cm" svg:y="11.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28" draw:style-name="gr5" draw:text-style-name="P27" draw:layer="layout" svg:width="21.589cm" svg:height="1.066cm" svg:x="1.905cm" svg:y="11.811cm">
          <text:p text:style-name="P25"><text:span text:style-name="T23">Benefit: <text:s/></text:span><text:span text:style-name="T11">Drastically speeds up long-horizon imagination, allowing the agent to plan further ahead.</text:span></text:p>
          <draw:enhanced-geometry svg:viewBox="0 0 21600 21600" draw:type="rectangle" draw:enhanced-path="M 0 0 L 21600 0 21600 21600 0 21600 0 0 Z N"/>
        </draw:custom-shape>
        <draw:custom-shape draw:name="Text 29" draw:style-name="gr5" draw:text-style-name="P11" draw:layer="layout" svg:width="15.239cm" svg:height="0.634cm" svg:x="1.27cm" svg:y="13.513cm">
          <text:p/>
          <draw:enhanced-geometry svg:viewBox="0 0 21600 21600" draw:type="rectangle" draw:enhanced-path="M 0 0 L 21600 0 21600 21600 0 21600 0 0 Z N"/>
        </draw:custom-shape>
        <draw:custom-shape draw:name="Text 30" draw:style-name="gr5" draw:text-style-name="P11" draw:layer="layout" svg:width="1.015cm" svg:height="0.634cm" svg:x="23.368cm" svg:y="13.513cm">
          <text:p text:style-name="P18"><text:span text:style-name="T12">4</text:span></text:p>
          <draw:enhanced-geometry svg:viewBox="0 0 21600 21600" draw:type="rectangle" draw:enhanced-path="M 0 0 L 21600 0 21600 21600 0 21600 0 0 Z N"/>
        </draw:custom-shape>
        <draw:custom-shape draw:name="Text 0" draw:style-name="gr23" draw:text-style-name="P24" draw:layer="layout" svg:width="15.239cm" svg:height="0.761cm" svg:x="1.27cm" svg:y="0.813cm">
          <text:p text:style-name="P14"><text:span text:style-name="T8">METHODOLOGY</text:span></text:p>
          <draw:enhanced-geometry svg:viewBox="0 0 21600 21600" draw:type="rectangle" draw:enhanced-path="M 0 0 L 21600 0 21600 21600 0 21600 0 0 Z N"/>
        </draw:custom-shape>
        <presentation:notes draw:style-name="dp2">
          <draw:page-thumbnail draw:name="Slide Image Placeholder 1" draw:style-name="gr8" draw:layer="layout" svg:width="15.239cm" svg:height="8.572cm" svg:x="1.905cm" svg:y="3.175cm" draw:page-number="4" presentation:class="page"/>
          <draw:frame draw:name="Notes Placeholder 2" presentation:style-name="pr1" draw:text-style-name="P11" draw:layer="layout" svg:width="15.239cm" svg:height="10cm" svg:x="1.905cm" svg:y="12.224cm" presentation:class="notes" presentation:user-transformed="true">
            <draw:text-box>
              <text:p><text:span text:style-name="T6">The second core component is the dynamics model. Its job is to predict future latent states, given the past states and the agent's actions -- and note, these are continuous actions, which is more realistic for things like robotics than the discrete action spaces used in older Atari-style benchmarks. The really clever trick here is what the paper calls 'Shortcut Forcing.' Normally, a model like this would predict frame by frame -- t+1, then t+2, then t+3, and so on. The problem with that approach is error compounds: small mistakes at each step pile up over a long imagined rollout. DreamerV4 instead uses a denoising schedule, parameterized by tau, that lets the model jump directly to a future state t+k in fewer steps. The benefit is twofold: it's dramatically faster to imagine long horizons, and because you're not chaining together hundreds of small sequential predictions, you avoid that compounding error problem. This is what lets the agent 'plan' much further into the future than earlier Dreamer variants could. [This wraps up the theory half -- right at 15 minutes. Transition: 'That covers the theoretical core of DreamerV4. Now let's move into the second half: how this actually looks in a real PyTorch codebase, and where things get messy in practice.']</text:span></text:p>
            </draw:text-box>
          </draw:frame>
          <draw:frame draw:name="Slide Number Placeholder 3" presentation:style-name="pr2" draw:text-style-name="P13" draw:layer="layout" svg:width="8.254cm" svg:height="1.273cm" svg:x="10.791cm" svg:y="24.126cm" presentation:class="page-number" presentation:user-transformed="true">
            <draw:text-box>
              <text:p text:style-name="P12"><text:span text:style-name="T7"><text:page-number>&lt;numero&gt;</text:page-number></text:span></text:p>
            </draw:text-box>
          </draw:frame>
        </presentation:notes>
      </draw:page>
      <draw:page draw:name="Slide 5" draw:style-name="dp1" draw:master-page-name="Predefinito">
        <draw:custom-shape draw:name="Text 0" draw:style-name="gr5" draw:text-style-name="P29" draw:layer="layout" svg:width="15.239cm" svg:height="0.761cm" svg:x="1.27cm" svg:y="0.813cm">
          <text:p text:style-name="P28"><text:span text:style-name="T24">PRACTICAL CODE ANALYSIS</text:span></text:p>
          <draw:enhanced-geometry svg:viewBox="0 0 21600 21600" draw:type="rectangle" draw:enhanced-path="M 0 0 L 21600 0 21600 21600 0 21600 0 0 Z N"/>
        </draw:custom-shape>
        <draw:custom-shape draw:name="Text 1" draw:style-name="gr5" draw:text-style-name="P8" draw:layer="layout" svg:width="22.859cm" svg:height="1.777cm" svg:x="1.27cm" svg:y="1.524cm">
          <text:p text:style-name="P7"><text:span text:style-name="T25">Analyzing the PyTorch Implementation</text:span></text:p>
          <draw:enhanced-geometry svg:viewBox="0 0 21600 21600" draw:type="rectangle" draw:enhanced-path="M 0 0 L 21600 0 21600 21600 0 21600 0 0 Z N"/>
        </draw:custom-shape>
        <draw:custom-shape draw:name="Text 2" draw:style-name="gr5" draw:text-style-name="P8" draw:layer="layout" svg:width="22.859cm" svg:height="1.523cm" svg:x="1.27cm" svg:y="3.81cm">
          <text:p text:style-name="P30"><text:span text:style-name="T5">Open-source PyTorch port applied to </text:span><text:span text:style-name="T26">DMControl</text:span><text:span text:style-name="T5"> (continuous action spaces)... diverging from the paper’s original JAX / Minecraft focus but retaining the idea of artificial world environment training.</text:span></text:p>
          <draw:enhanced-geometry svg:viewBox="0 0 21600 21600" draw:type="rectangle" draw:enhanced-path="M 0 0 L 21600 0 21600 21600 0 21600 0 0 Z N"/>
        </draw:custom-shape>
        <draw:custom-shape draw:name="Shape 3" draw:style-name="gr1" draw:text-style-name="P1" draw:layer="layout" svg:width="7.289cm" svg:height="3.936cm" svg:x="1.27cm" svg:y="5.9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4" draw:style-name="gr5" draw:text-style-name="P32" draw:layer="layout" svg:width="7.289cm" svg:height="1.65cm" svg:x="1.27cm" svg:y="6.35cm">
          <text:p text:style-name="P31"><text:span text:style-name="T27">350GB</text:span></text:p>
          <draw:enhanced-geometry svg:viewBox="0 0 21600 21600" draw:type="rectangle" draw:enhanced-path="M 0 0 L 21600 0 21600 21600 0 21600 0 0 Z N"/>
        </draw:custom-shape>
        <draw:custom-shape draw:name="Text 5" draw:style-name="gr5" draw:text-style-name="P8" draw:layer="layout" svg:width="6.527cm" svg:height="1.523cm" svg:x="1.651cm" svg:y="8.077cm">
          <text:p text:style-name="P33"><text:span text:style-name="T28">disk space to train</text:span></text:p>
          <text:p text:style-name="P33"><text:span text:style-name="T28">from scratch</text:span></text:p>
          <draw:enhanced-geometry svg:viewBox="0 0 21600 21600" draw:type="rectangle" draw:enhanced-path="M 0 0 L 21600 0 21600 21600 0 21600 0 0 Z N"/>
        </draw:custom-shape>
        <draw:custom-shape draw:name="Shape 6" draw:style-name="gr1" draw:text-style-name="P1" draw:layer="layout" svg:width="7.289cm" svg:height="3.936cm" svg:x="9.042cm" svg:y="5.9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7" draw:style-name="gr5" draw:text-style-name="P32" draw:layer="layout" svg:width="7.289cm" svg:height="1.65cm" svg:x="9.042cm" svg:y="6.35cm">
          <text:p text:style-name="P31"><text:span text:style-name="T27">8×</text:span></text:p>
          <draw:enhanced-geometry svg:viewBox="0 0 21600 21600" draw:type="rectangle" draw:enhanced-path="M 0 0 L 21600 0 21600 21600 0 21600 0 0 Z N"/>
        </draw:custom-shape>
        <draw:custom-shape draw:name="Text 8" draw:style-name="gr5" draw:text-style-name="P8" draw:layer="layout" svg:width="6.527cm" svg:height="1.523cm" svg:x="9.423cm" svg:y="8.077cm">
          <text:p text:style-name="P33"><text:span text:style-name="T28">high-end GPUs</text:span></text:p>
          <text:p text:style-name="P33"><text:span text:style-name="T28">required</text:span></text:p>
          <draw:enhanced-geometry svg:viewBox="0 0 21600 21600" draw:type="rectangle" draw:enhanced-path="M 0 0 L 21600 0 21600 21600 0 21600 0 0 Z N"/>
        </draw:custom-shape>
        <draw:custom-shape draw:name="Shape 9" draw:style-name="gr1" draw:text-style-name="P1" draw:layer="layout" svg:width="7.289cm" svg:height="3.936cm" svg:x="16.815cm" svg:y="5.9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10" draw:style-name="gr5" draw:text-style-name="P32" draw:layer="layout" svg:width="7.289cm" svg:height="1.65cm" svg:x="16.815cm" svg:y="6.35cm">
          <text:p text:style-name="P31"><text:span text:style-name="T27">48 hrs</text:span></text:p>
          <draw:enhanced-geometry svg:viewBox="0 0 21600 21600" draw:type="rectangle" draw:enhanced-path="M 0 0 L 21600 0 21600 21600 0 21600 0 0 Z N"/>
        </draw:custom-shape>
        <draw:custom-shape draw:name="Text 11" draw:style-name="gr5" draw:text-style-name="P8" draw:layer="layout" svg:width="6.527cm" svg:height="1.523cm" svg:x="17.196cm" svg:y="8.077cm">
          <text:p text:style-name="P33"><text:span text:style-name="T28">continuous training</text:span></text:p>
          <text:p text:style-name="P33"><text:span text:style-name="T28">runtime</text:span></text:p>
          <draw:enhanced-geometry svg:viewBox="0 0 21600 21600" draw:type="rectangle" draw:enhanced-path="M 0 0 L 21600 0 21600 21600 0 21600 0 0 Z N"/>
        </draw:custom-shape>
        <draw:custom-shape draw:name="Shape 12" draw:style-name="gr24" draw:text-style-name="P1" draw:layer="layout" svg:width="22.859cm" svg:height="2.666cm" svg:x="1.27cm" svg:y="10.5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3" draw:style-name="gr3" draw:text-style-name="P1" draw:layer="layout" svg:width="1.726cm" svg:height="1.726cm" svg:x="1.829cm" svg:y="10.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0" draw:style-name="gr4" draw:text-style-name="P2" draw:layer="layout" svg:width="0.897cm" svg:height="0.897cm" svg:x="2.243cm" svg:y="11.413cm">
          <draw:image xlink:href="Pictures/100002010000010000000100EDC6E0E8.png" xlink:type="simple" xlink:show="embed" xlink:actuate="onLoad">
            <text:p/>
          </draw:image>
        </draw:frame>
        <draw:custom-shape draw:name="Text 14" draw:style-name="gr5" draw:text-style-name="P11" draw:layer="layout" svg:width="19.303cm" svg:height="2.031cm" svg:x="4.191cm" svg:y="10.795cm">
          <text:p text:style-name="P34"><text:span text:style-name="T29">Adopted approach:</text:span><text:span text:style-name="T30"> <text:s/></text:span><text:span text:style-name="T31">Focus on the inference architecture and run a live, interactive web server using pre-trained weights.</text:span></text:p>
          <draw:enhanced-geometry svg:viewBox="0 0 21600 21600" draw:type="rectangle" draw:enhanced-path="M 0 0 L 21600 0 21600 21600 0 21600 0 0 Z N"/>
        </draw:custom-shape>
        <draw:custom-shape draw:name="Text 15" draw:style-name="gr5" draw:text-style-name="P11" draw:layer="layout" svg:width="15.239cm" svg:height="0.634cm" svg:x="1.27cm" svg:y="13.513cm">
          <text:p/>
          <draw:enhanced-geometry svg:viewBox="0 0 21600 21600" draw:type="rectangle" draw:enhanced-path="M 0 0 L 21600 0 21600 21600 0 21600 0 0 Z N"/>
        </draw:custom-shape>
        <draw:custom-shape draw:name="Text 16" draw:style-name="gr5" draw:text-style-name="P8" draw:layer="layout" svg:width="1.015cm" svg:height="0.634cm" svg:x="23.368cm" svg:y="13.513cm">
          <text:p text:style-name="P35"><text:span text:style-name="T32">5</text:span></text:p>
          <draw:enhanced-geometry svg:viewBox="0 0 21600 21600" draw:type="rectangle" draw:enhanced-path="M 0 0 L 21600 0 21600 21600 0 21600 0 0 Z N"/>
        </draw:custom-shape>
        <presentation:notes draw:style-name="dp2">
          <draw:page-thumbnail draw:name="Slide Image Placeholder 1" draw:style-name="gr8" draw:layer="layout" svg:width="15.239cm" svg:height="8.572cm" svg:x="1.905cm" svg:y="3.175cm" draw:page-number="5" presentation:class="page"/>
          <draw:frame draw:name="Notes Placeholder 2" presentation:style-name="pr1" draw:text-style-name="P11" draw:layer="layout" svg:width="15.239cm" svg:height="10cm" svg:x="1.905cm" svg:y="12.224cm" presentation:class="notes" presentation:user-transformed="true">
            <draw:text-box>
              <text:p><text:span text:style-name="T6">For the second half, we're switching gears from theory to practice. We worked with an open-source PyTorch implementation of DreamerV4. It's worth noting up front: this isn't the exact original setup -- the paper's original work used JAX and was demonstrated on Minecraft, while the repo we analyzed applies the same architecture to DMControl, a continuous-control benchmark. We also want to be upfront about the hardware reality here. Training this model from scratch is not something you do on a laptop -- we're talking roughly 350 gigabytes of disk space and eight high-end GPUs running for 48 hours straight. That's simply out of reach for a course project. So our approach was to focus on the inference side -- using pre-trained weights -- and build a live, interactive web server so we could actually see and control the world model in action, rather than trying to reproduce the full training run.</text:span></text:p>
            </draw:text-box>
          </draw:frame>
          <draw:frame draw:name="Slide Number Placeholder 3" presentation:style-name="pr2" draw:text-style-name="P13" draw:layer="layout" svg:width="8.254cm" svg:height="1.273cm" svg:x="10.791cm" svg:y="24.126cm" presentation:class="page-number" presentation:user-transformed="true">
            <draw:text-box>
              <text:p text:style-name="P12"><text:span text:style-name="T7"><text:page-number>&lt;numero&gt;</text:page-number></text:span></text:p>
            </draw:text-box>
          </draw:frame>
        </presentation:notes>
      </draw:page>
      <draw:page draw:name="Slide 6" draw:style-name="dp3" draw:master-page-name="Predefinito">
        <draw:custom-shape draw:name="Text 1" draw:style-name="gr5" draw:text-style-name="P11" draw:layer="layout" svg:width="22.859cm" svg:height="1.777cm" svg:x="1.27cm" svg:y="1.524cm">
          <text:p text:style-name="P16"><text:span text:style-name="T33">The Main Actors: Encoder &amp; Tokenizer</text:span></text:p>
          <draw:enhanced-geometry svg:viewBox="0 0 21600 21600" draw:type="rectangle" draw:enhanced-path="M 0 0 L 21600 0 21600 21600 0 21600 0 0 Z N"/>
        </draw:custom-shape>
        <draw:custom-shape draw:name="Text 2" draw:style-name="gr5" draw:text-style-name="P11" draw:layer="layout" svg:width="22.859cm" svg:height="1.015cm" svg:x="1.27cm" svg:y="3.429cm">
          <text:p/>
          <draw:enhanced-geometry svg:viewBox="0 0 21600 21600" draw:type="rectangle" draw:enhanced-path="M 0 0 L 21600 0 21600 21600 0 21600 0 0 Z N"/>
        </draw:custom-shape>
        <draw:custom-shape draw:name="Text 5" draw:style-name="gr5" draw:text-style-name="P11" draw:layer="layout" svg:width="22.859cm" svg:height="1.015cm" svg:x="1.27cm" svg:y="11.735cm">
          <text:p/>
          <draw:enhanced-geometry svg:viewBox="0 0 21600 21600" draw:type="rectangle" draw:enhanced-path="M 0 0 L 21600 0 21600 21600 0 21600 0 0 Z N"/>
        </draw:custom-shape>
        <draw:custom-shape draw:name="Text 6" draw:style-name="gr5" draw:text-style-name="P11" draw:layer="layout" svg:width="15.239cm" svg:height="0.634cm" svg:x="1.27cm" svg:y="13.513cm">
          <text:p/>
          <draw:enhanced-geometry svg:viewBox="0 0 21600 21600" draw:type="rectangle" draw:enhanced-path="M 0 0 L 21600 0 21600 21600 0 21600 0 0 Z N"/>
        </draw:custom-shape>
        <draw:custom-shape draw:name="Text 7" draw:style-name="gr5" draw:text-style-name="P11" draw:layer="layout" svg:width="1.015cm" svg:height="0.634cm" svg:x="23.368cm" svg:y="13.513cm">
          <text:p text:style-name="P18"><text:span text:style-name="T12">6</text:span></text:p>
          <draw:enhanced-geometry svg:viewBox="0 0 21600 21600" draw:type="rectangle" draw:enhanced-path="M 0 0 L 21600 0 21600 21600 0 21600 0 0 Z N"/>
        </draw:custom-shape>
        <draw:custom-shape draw:name="Text 0" draw:style-name="gr25" draw:text-style-name="P36" draw:layer="layout" svg:width="15.239cm" svg:height="0.761cm" svg:x="1.27cm" svg:y="0.813cm">
          <text:p text:style-name="P28"><text:span text:style-name="T24">PRACTICAL CODE ANALYSIS</text:span></text:p>
          <draw:enhanced-geometry svg:viewBox="0 0 21600 21600" draw:type="rectangle" draw:enhanced-path="M 0 0 L 21600 0 21600 21600 0 21600 0 0 Z N"/>
        </draw:custom-shape>
        <draw:frame draw:style-name="gr7" draw:text-style-name="P10" draw:layer="layout" svg:width="15.6cm" svg:height="6.603cm" svg:x="1.2cm" svg:y="3.429cm">
          <draw:image xlink:href="Pictures/1000000000000714000002FFEB73458D.png" xlink:type="simple" xlink:show="embed" xlink:actuate="onLoad">
            <text:p/>
          </draw:image>
        </draw:frame>
        <presentation:notes draw:style-name="dp2">
          <draw:page-thumbnail draw:name="Slide Image Placeholder 1" draw:style-name="gr8" draw:layer="layout" svg:width="15.239cm" svg:height="8.572cm" svg:x="1.905cm" svg:y="3.175cm" draw:page-number="6" presentation:class="page"/>
          <draw:frame draw:name="Notes Placeholder 2" presentation:style-name="pr1" draw:text-style-name="P11" draw:layer="layout" svg:width="15.239cm" svg:height="10cm" svg:x="1.905cm" svg:y="12.224cm" presentation:class="notes" presentation:user-transformed="true">
            <draw:text-box>
              <text:p><text:span text:style-name="T6">Let's look at real code now. This is the Encoder class, and it maps directly onto the tokenizer concept we discussed a few minutes ago. Step one: self.mae(patch_tokens) applies that random masking we talked about -- this line is literally where the 90%-patch-hiding happens during training. Step two: the masked tokens get passed through self.transformer -- this is the Block-Causal Transformer doing the heavy lifting, explicitly separating spatial mixing, meaning relationships within a single frame, from temporal mixing, meaning relationships across frames in the sequence. Step three, and this is a small detail but an important one: the output goes through a tanh bottleneck. This strictly bounds every latent value into the range [-1, 1]. That's a deliberate design choice -- it keeps the latent space numerically stable, which matters a lot when you're about to feed these latents into a dynamics model that's going to be predicting many steps into the future. So in about fifteen lines, you can see the entire tokenizer pipeline we described conceptually: mask, transform, bound.</text:span></text:p>
            </draw:text-box>
          </draw:frame>
          <draw:frame draw:name="Slide Number Placeholder 3" presentation:style-name="pr2" draw:text-style-name="P13" draw:layer="layout" svg:width="8.254cm" svg:height="1.273cm" svg:x="10.791cm" svg:y="24.126cm" presentation:class="page-number" presentation:user-transformed="true">
            <draw:text-box>
              <text:p text:style-name="P12"><text:span text:style-name="T7"><text:page-number>&lt;numero&gt;</text:page-number></text:span></text:p>
            </draw:text-box>
          </draw:frame>
        </presentation:notes>
      </draw:page>
      <draw:page draw:name="Slide 7" draw:style-name="dp3" draw:master-page-name="Predefinito">
        <draw:custom-shape draw:name="Text 1" draw:style-name="gr5" draw:text-style-name="P11" draw:layer="layout" svg:width="22.859cm" svg:height="1.777cm" svg:x="1.27cm" svg:y="1.524cm">
          <text:p text:style-name="P16"><text:span text:style-name="T34">Real-World Engineering Challenges</text:span></text:p>
          <draw:enhanced-geometry svg:viewBox="0 0 21600 21600" draw:type="rectangle" draw:enhanced-path="M 0 0 L 21600 0 21600 21600 0 21600 0 0 Z N"/>
        </draw:custom-shape>
        <draw:custom-shape draw:name="Shape 2" draw:style-name="gr9" draw:text-style-name="P1" draw:layer="layout" svg:width="10.921cm" svg:height="8cm" svg:x="1.27cm" svg:y="3.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3" draw:style-name="gr10" draw:text-style-name="P1" draw:layer="layout" svg:width="1.574cm" svg:height="1.574cm" svg:x="1.905cm" svg:y="4.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0" draw:style-name="gr4" draw:text-style-name="P2" draw:layer="layout" svg:width="0.818cm" svg:height="0.818cm" svg:x="2.283cm" svg:y="4.899cm">
          <draw:image xlink:href="Pictures/100002010000010000000100DB61BBA6.png" xlink:type="simple" xlink:show="embed" xlink:actuate="onLoad">
            <text:p/>
          </draw:image>
        </draw:frame>
        <draw:custom-shape draw:name="Text 4" draw:style-name="gr5" draw:text-style-name="P11" draw:layer="layout" svg:width="10.921cm" svg:height="0.888cm" svg:x="1.27cm" svg:y="6.35cm">
          <text:p text:style-name="P25"><text:span text:style-name="T10">The Problem</text:span></text:p>
          <draw:enhanced-geometry svg:viewBox="0 0 21600 21600" draw:type="rectangle" draw:enhanced-path="M 0 0 L 21600 0 21600 21600 0 21600 0 0 Z N"/>
        </draw:custom-shape>
        <draw:custom-shape draw:name="Text 5" draw:style-name="gr5" draw:text-style-name="P11" draw:layer="layout" svg:width="9.651cm" svg:height="4.063cm" svg:x="1.905cm" svg:y="7.417cm">
          <text:p text:style-name="P37"><text:span text:style-name="T14">preprocess_dataset.py expects .png files, but the HuggingFace dataset only hosts serialized .pt tensor dictionaries.</text:span></text:p>
          <draw:enhanced-geometry svg:viewBox="0 0 21600 21600" draw:type="rectangle" draw:enhanced-path="M 0 0 L 21600 0 21600 21600 0 21600 0 0 Z N"/>
        </draw:custom-shape>
        <draw:line draw:name="Shape 6" draw:style-name="gr26" draw:text-style-name="P2" draw:layer="layout" svg:x1="12.319cm" svg:y1="7.874cm" svg:x2="13.716cm" svg:y2="7.874cm">
          <text:p/>
        </draw:line>
        <draw:custom-shape draw:name="Shape 7" draw:style-name="gr16" draw:text-style-name="P1" draw:layer="layout" svg:width="10.159cm" svg:height="8cm" svg:x="13.97cm" svg:y="3.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8" draw:style-name="gr1" draw:text-style-name="P1" draw:layer="layout" svg:width="1.574cm" svg:height="1.574cm" svg:x="14.605cm" svg:y="4.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1" draw:style-name="gr4" draw:text-style-name="P2" draw:layer="layout" svg:width="0.818cm" svg:height="0.818cm" svg:x="14.983cm" svg:y="4.899cm">
          <draw:image xlink:href="Pictures/100002010000010000000100B9BC7D42.png" xlink:type="simple" xlink:show="embed" xlink:actuate="onLoad">
            <text:p/>
          </draw:image>
        </draw:frame>
        <draw:custom-shape draw:name="Text 9" draw:style-name="gr5" draw:text-style-name="P11" draw:layer="layout" svg:width="10.159cm" svg:height="0.888cm" svg:x="13.97cm" svg:y="6.35cm">
          <text:p text:style-name="P25"><text:span text:style-name="T10">Our Solution</text:span></text:p>
          <draw:enhanced-geometry svg:viewBox="0 0 21600 21600" draw:type="rectangle" draw:enhanced-path="M 0 0 L 21600 0 21600 21600 0 21600 0 0 Z N"/>
        </draw:custom-shape>
        <draw:custom-shape draw:name="Text 10" draw:style-name="gr5" draw:text-style-name="P11" draw:layer="layout" svg:width="8.889cm" svg:height="4.063cm" svg:x="14.605cm" svg:y="7.417cm">
          <text:p text:style-name="P37"><text:span text:style-name="T14">Patched the code to inject a “dummy” black frame at sequence initialization, avoiding a FileNotFoundError crash.</text:span></text:p>
          <draw:enhanced-geometry svg:viewBox="0 0 21600 21600" draw:type="rectangle" draw:enhanced-path="M 0 0 L 21600 0 21600 21600 0 21600 0 0 Z N"/>
        </draw:custom-shape>
        <draw:custom-shape draw:name="Shape 11" draw:style-name="gr27" draw:text-style-name="P1" draw:layer="layout" svg:width="22.859cm" svg:height="1.396cm" svg:x="1.27cm" svg:y="12.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12" draw:style-name="gr5" draw:text-style-name="P11" draw:layer="layout" svg:width="21.589cm" svg:height="1.396cm" svg:x="1.905cm" svg:y="12.319cm">
          <text:p text:style-name="P16"><text:span text:style-name="T23">Result: <text:s/></text:span><text:span text:style-name="T11">The dynamics model “hallucinates” the environment from a blank state, driven purely by keyboard input.</text:span></text:p>
          <draw:enhanced-geometry svg:viewBox="0 0 21600 21600" draw:type="rectangle" draw:enhanced-path="M 0 0 L 21600 0 21600 21600 0 21600 0 0 Z N"/>
        </draw:custom-shape>
        <draw:custom-shape draw:name="Text 13" draw:style-name="gr5" draw:text-style-name="P11" draw:layer="layout" svg:width="15.239cm" svg:height="0.634cm" svg:x="1.27cm" svg:y="13.513cm">
          <text:p text:style-name="P16"><text:span text:style-name="T12">Practice — Part 2 of 2</text:span></text:p>
          <draw:enhanced-geometry svg:viewBox="0 0 21600 21600" draw:type="rectangle" draw:enhanced-path="M 0 0 L 21600 0 21600 21600 0 21600 0 0 Z N"/>
        </draw:custom-shape>
        <draw:custom-shape draw:name="Text 14" draw:style-name="gr5" draw:text-style-name="P11" draw:layer="layout" svg:width="1.015cm" svg:height="0.634cm" svg:x="23.368cm" svg:y="13.513cm">
          <text:p text:style-name="P18"><text:span text:style-name="T12">7</text:span></text:p>
          <draw:enhanced-geometry svg:viewBox="0 0 21600 21600" draw:type="rectangle" draw:enhanced-path="M 0 0 L 21600 0 21600 21600 0 21600 0 0 Z N"/>
        </draw:custom-shape>
        <draw:custom-shape draw:name="Text 0" draw:style-name="gr28" draw:text-style-name="P36" draw:layer="layout" svg:width="15.239cm" svg:height="0.761cm" svg:x="1.27cm" svg:y="0.813cm">
          <text:p text:style-name="P28"><text:span text:style-name="T24">PRACTICAL CODE ANALYSIS</text:span></text:p>
          <draw:enhanced-geometry svg:viewBox="0 0 21600 21600" draw:type="rectangle" draw:enhanced-path="M 0 0 L 21600 0 21600 21600 0 21600 0 0 Z N"/>
        </draw:custom-shape>
        <presentation:notes draw:style-name="dp2">
          <draw:page-thumbnail draw:name="Slide Image Placeholder 1" draw:style-name="gr8" draw:layer="layout" svg:width="15.239cm" svg:height="8.572cm" svg:x="1.905cm" svg:y="3.175cm" draw:page-number="7" presentation:class="page"/>
          <draw:frame draw:name="Notes Placeholder 2" presentation:style-name="pr1" draw:text-style-name="P11" draw:layer="layout" svg:width="15.239cm" svg:height="10cm" svg:x="1.905cm" svg:y="12.224cm" presentation:class="notes" presentation:user-transformed="true">
            <draw:text-box>
              <text:p><text:span text:style-name="T6">This next slide is honestly one of the most important ones for us, because it's less about the paper and more about what it actually takes to get research code running. We want to highlight this as a demonstration of engineering problem-solving, not just running someone else's script. When we tried to run the preprocessing pipeline, we hit a wall: the script preprocess_dataset.py expects .png image files. But the dataset actually hosted on HuggingFace only ships serialized .pt tensor dictionaries -- a completely different format. Running it out of the box just threw a FileNotFoundError. Rather than getting stuck there, we patched the code ourselves. Our fix injects a 'dummy' black frame at the very start of the sequence, so the pipeline has something valid to initialize from instead of crashing. And the result is actually pretty striking: once that first frame is in place, the dynamics model takes over completely and starts hallucinating a full, coherent environment from what was essentially a blank canvas -- driven purely by our keyboard inputs. So we didn't just run the code -- we debugged it, understood why it broke, and got it working under real hardware and data constraints.</text:span></text:p>
            </draw:text-box>
          </draw:frame>
          <draw:frame draw:name="Slide Number Placeholder 3" presentation:style-name="pr2" draw:text-style-name="P13" draw:layer="layout" svg:width="8.254cm" svg:height="1.273cm" svg:x="10.791cm" svg:y="24.126cm" presentation:class="page-number" presentation:user-transformed="true">
            <draw:text-box>
              <text:p text:style-name="P12"><text:span text:style-name="T7"><text:page-number>&lt;numero&gt;</text:page-number></text:span></text:p>
            </draw:text-box>
          </draw:frame>
        </presentation:notes>
      </draw:page>
      <draw:page draw:name="Slide 8" draw:style-name="dp1" draw:master-page-name="Predefinito">
        <draw:custom-shape draw:name="Text 1" draw:style-name="gr5" draw:text-style-name="P20" draw:layer="layout" svg:width="22.859cm" svg:height="0.888cm" svg:x="1.27cm" svg:y="1.143cm">
          <text:p text:style-name="P38"><text:span text:style-name="T26">LIVE DEMONSTRATION</text:span></text:p>
          <draw:enhanced-geometry svg:viewBox="0 0 21600 21600" draw:type="rectangle" draw:enhanced-path="M 0 0 L 21600 0 21600 21600 0 21600 0 0 Z N"/>
        </draw:custom-shape>
        <draw:custom-shape draw:name="Text 2" draw:style-name="gr5" draw:text-style-name="P8" draw:layer="layout" svg:width="22.859cm" svg:height="1.65cm" svg:x="1.27cm" svg:y="2.083cm">
          <text:p text:style-name="P39"><text:span text:style-name="T25">Let’s See It In Action</text:span></text:p>
          <draw:enhanced-geometry svg:viewBox="0 0 21600 21600" draw:type="rectangle" draw:enhanced-path="M 0 0 L 21600 0 21600 21600 0 21600 0 0 Z N"/>
        </draw:custom-shape>
        <draw:custom-shape draw:name="Shape 3" draw:style-name="gr1" draw:text-style-name="P1" draw:layer="layout" svg:width="10.54cm" svg:height="7.619cm" svg:x="1.27cm" svg:y="4.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4" draw:style-name="gr3" draw:text-style-name="P1" draw:layer="layout" svg:width="2.158cm" svg:height="2.158cm" svg:x="2.159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0" draw:style-name="gr4" draw:text-style-name="P2" draw:layer="layout" svg:width="1.122cm" svg:height="1.122cm" svg:x="2.677cm" svg:y="6.106cm">
          <draw:image xlink:href="Pictures/100002010000010000000100659F77F6.png" xlink:type="simple" xlink:show="embed" xlink:actuate="onLoad">
            <text:p/>
          </draw:image>
        </draw:frame>
        <draw:custom-shape draw:name="Text 5" draw:style-name="gr5" draw:text-style-name="P8" draw:layer="layout" svg:width="8.889cm" svg:height="1.396cm" svg:x="2.159cm" svg:y="8.382cm">
          <text:p text:style-name="P40"><text:span text:style-name="T35">1. Interactive Jupyter Notebook</text:span></text:p>
          <draw:enhanced-geometry svg:viewBox="0 0 21600 21600" draw:type="rectangle" draw:enhanced-path="M 0 0 L 21600 0 21600 21600 0 21600 0 0 Z N"/>
        </draw:custom-shape>
        <draw:custom-shape draw:name="Text 6" draw:style-name="gr5" draw:text-style-name="P8" draw:layer="layout" svg:width="8.889cm" svg:height="2.031cm" svg:x="2.159cm" svg:y="9.779cm">
          <text:p text:style-name="P30"><text:span text:style-name="T36">Walking through the tensor shapes and architecture in dreamer4_tutorial.ipynb.</text:span></text:p>
          <draw:enhanced-geometry svg:viewBox="0 0 21600 21600" draw:type="rectangle" draw:enhanced-path="M 0 0 L 21600 0 21600 21600 0 21600 0 0 Z N"/>
        </draw:custom-shape>
        <draw:custom-shape draw:name="Shape 7" draw:style-name="gr1" draw:text-style-name="P1" draw:layer="layout" svg:width="10.54cm" svg:height="7.619cm" svg:x="12.827cm" svg:y="4.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8" draw:style-name="gr21" draw:text-style-name="P1" draw:layer="layout" svg:width="2.158cm" svg:height="2.158cm" svg:x="13.716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1" draw:style-name="gr4" draw:text-style-name="P2" draw:layer="layout" svg:width="1.122cm" svg:height="1.122cm" svg:x="14.234cm" svg:y="6.106cm">
          <draw:image xlink:href="Pictures/100002010000010000000100774ABBB6.png" xlink:type="simple" xlink:show="embed" xlink:actuate="onLoad">
            <text:p/>
          </draw:image>
        </draw:frame>
        <draw:custom-shape draw:name="Text 9" draw:style-name="gr5" draw:text-style-name="P8" draw:layer="layout" svg:width="8.889cm" svg:height="1.396cm" svg:x="13.716cm" svg:y="8.382cm">
          <text:p text:style-name="P40"><text:span text:style-name="T35">2. Real-Time Web Server Inference</text:span></text:p>
          <draw:enhanced-geometry svg:viewBox="0 0 21600 21600" draw:type="rectangle" draw:enhanced-path="M 0 0 L 21600 0 21600 21600 0 21600 0 0 Z N"/>
        </draw:custom-shape>
        <draw:custom-shape draw:name="Text 10" draw:style-name="gr5" draw:text-style-name="P8" draw:layer="layout" svg:width="8.889cm" svg:height="2.031cm" svg:x="13.716cm" svg:y="9.779cm">
          <text:p text:style-name="P30"><text:span text:style-name="T36">Launching interactive.py to control the agent and watch the World Model hallucinate live frames.</text:span></text:p>
          <draw:enhanced-geometry svg:viewBox="0 0 21600 21600" draw:type="rectangle" draw:enhanced-path="M 0 0 L 21600 0 21600 21600 0 21600 0 0 Z N"/>
        </draw:custom-shape>
        <draw:custom-shape draw:name="Text 11" draw:style-name="gr5" draw:text-style-name="P11" draw:layer="layout" svg:width="15.239cm" svg:height="0.634cm" svg:x="1.27cm" svg:y="13.513cm">
          <text:p/>
          <draw:enhanced-geometry svg:viewBox="0 0 21600 21600" draw:type="rectangle" draw:enhanced-path="M 0 0 L 21600 0 21600 21600 0 21600 0 0 Z N"/>
        </draw:custom-shape>
        <draw:custom-shape draw:name="Text 12" draw:style-name="gr29" draw:text-style-name="P41" draw:layer="layout" svg:width="1.032cm" svg:height="0.634cm" svg:x="23.368cm" svg:y="13.513cm">
          <text:p text:style-name="P35"><text:span text:style-name="T32">8</text:span></text:p>
          <draw:enhanced-geometry svg:viewBox="0 0 21600 21600" draw:type="rectangle" draw:enhanced-path="M 0 0 L 21600 0 21600 21600 0 21600 0 0 Z N"/>
        </draw:custom-shape>
        <presentation:notes draw:style-name="dp2">
          <draw:page-thumbnail draw:name="Slide Image Placeholder 1" draw:style-name="gr8" draw:layer="layout" svg:width="15.239cm" svg:height="8.572cm" svg:x="1.905cm" svg:y="3.175cm" draw:page-number="8" presentation:class="page"/>
          <draw:frame draw:name="Notes Placeholder 2" presentation:style-name="pr1" draw:text-style-name="P11" draw:layer="layout" svg:width="15.239cm" svg:height="10cm" svg:x="1.905cm" svg:y="12.224cm" presentation:class="notes" presentation:user-transformed="true">
            <draw:text-box>
              <text:p><text:span text:style-name="T6">To close things out, we're going to show you this live rather than just talk about it. First, we'll open dreamer4_tutorial.ipynb and walk through the actual tensor shapes moving through the architecture -- the encoder output, the latent bottleneck, the dynamics model rollout -- so you can see the numbers behind everything we just explained. Then, we'll launch interactive.py, which spins up a real-time web server. From there we can actually control the agent with the keyboard and watch the world model hallucinate the environment live, frame by frame, in response to our inputs. [Switch to live screen share / notebook now]</text:span></text:p>
            </draw:text-box>
          </draw:frame>
          <draw:frame draw:name="Slide Number Placeholder 3" presentation:style-name="pr2" draw:text-style-name="P13" draw:layer="layout" svg:width="8.254cm" svg:height="1.273cm" svg:x="10.791cm" svg:y="24.126cm" presentation:class="page-number" presentation:user-transformed="true">
            <draw:text-box>
              <text:p text:style-name="P12"><text:span text:style-name="T7"><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penEnd_20_5" draw:display-name="msArrowOpenEnd 5" svg:viewBox="0 0 450 450" svg:d="M225 0l225 409-68 41-157-288-158 288-67-41z"/>
    <draw:stroke-dash draw:name="Dash_20_4" draw:display-name="Dash 4" draw:style="round" draw:dots2="1" draw:dots2-length="352%" draw:distance="264%"/>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outline3" style:family="presentation" style:parent-style-name="Predefinito-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4" style:family="presentation" style:parent-style-name="Predefinito-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4.288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85cm"/>
    </style:style>
    <style:style style:name="Mpr2"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style:handout-master>
    <style:master-page style:name="Predefinito" style:page-layout-name="PM1" draw:style-name="Mdp1">
      <draw:frame presentation:style-name="Predefinito-title" draw:layer="backgroundobjects" svg:width="22.859cm" svg:height="2.385cm" svg:x="1.27cm" svg:y="0.57cm" presentation:class="title" presentation:placeholder="true">
        <draw:text-box/>
      </draw:frame>
      <draw:frame presentation:style-name="Predefinito-outline1" draw:layer="backgroundobjects" svg:width="22.859cm" svg:height="9.429cm" svg:x="1.27cm" svg:y="3.343cm" presentation:class="outline" presentation:placeholder="true">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6-07-03T10:52:40.93</dc:date>
    <meta:generator>OpenOffice/4.1.15$Win32 OpenOffice.org_project/4115m2$Build-9813</meta:generator>
    <meta:editing-duration>PT24M43S</meta:editing-duration>
    <meta:editing-cycles>1</meta:editing-cycles>
    <meta:document-statistic meta:object-count="187"/>
  </office:meta>
</office:document-meta>
</file>