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F000001D8014A434D.png"/>
  <manifest:file-entry manifest:media-type="image/png" manifest:full-path="Pictures/10000201000004C70000025A2C9BCB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3.151cm" fo:min-width="20.51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101cm" fo:min-width="9.84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ggetto_20_senza_20_riempimento_20_e_20_linea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4.58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3.75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15cm" fo:min-width="19.79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714cm"/>
    </style:style>
    <style:style style:name="gr10" style:family="graphic" style:parent-style-name="standard">
      <style:graphic-properties draw:stroke="none" draw:fill="none" fo:min-height="1.114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-outline1">
      <style:graphic-properties fo:min-height="13.85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40pt" fo:font-style="normal" fo:text-shadow="none" style:text-underline-style="none" fo:font-weight="normal" style:letter-kerning="true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Corsivo" style:font-family-generic="swiss" style:font-pitch="variable" fo:font-size="22pt" fo:font-style="italic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italic" style:font-weight-asian="normal" style:font-family-complex="Tahoma" style:font-family-generic-complex="system" style:font-pitch-complex="variable" style:font-size-complex="22pt" style:font-style-complex="italic" style:font-weight-complex="normal" style:text-emphasize="none" style:font-relief="none"/>
    </style:style>
    <style:style style:name="P9" style:family="paragraph">
      <style:paragraph-properties fo:text-align="center"/>
    </style:style>
    <style:style style:name="P10" style:family="paragraph">
      <style:text-properties fo:font-size="24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40pt" fo:font-style="normal" fo:text-shadow="none" style:text-underline-style="none" fo:font-weight="normal" style:letter-kerning="true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Arial" style:font-style-name="Corsivo" style:font-family-generic="swiss" style:font-pitch="variable" fo:font-size="22pt" fo:font-style="italic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italic" style:font-weight-asian="normal" style:font-family-complex="Tahoma" style:font-family-generic-complex="system" style:font-pitch-complex="variable" style:font-size-complex="22pt" style:font-style-complex="italic" style:font-weight-complex="normal" style:text-emphasize="none" style:font-relief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2" draw:layer="layout" svg:width="21.013cm" svg:height="3.401cm" svg:x="3.494cm" svg:y="0.8cm">
          <draw:text-box>
            <text:p text:style-name="P1"><text:span text:style-name="T1">DreamerV4: Training Agents </text:span></text:p>
            <text:p text:style-name="P1"><text:span text:style-name="T1">Inside of Scalable World Models </text:span></text:p>
          </draw:text-box>
        </draw:frame>
        <draw:frame draw:style-name="gr2" draw:text-style-name="P3" draw:layer="layout" svg:width="10.416cm" svg:height="1.361cm" svg:x="8.83cm" svg:y="5.449cm">
          <draw:text-box>
            <text:p text:style-name="P1"><text:span text:style-name="T2">Reinforcement Learning</text:span></text:p>
            <text:p text:style-name="P1"><text:span text:style-name="T3">University of Verona, </text:span><text:span text:style-name="T2">Academic Year 2025/26</text:span></text:p>
          </draw:text-box>
        </draw:frame>
        <draw:frame draw:style-name="gr3" draw:text-style-name="P4" draw:layer="layout" svg:width="5.602cm" svg:height="2.017cm" svg:x="0.229cm" svg:y="18.539cm">
          <draw:image xlink:href="Pictures/100002010000051F000001D8014A434D.png" xlink:type="simple" xlink:show="embed" xlink:actuate="onLoad">
            <text:p/>
          </draw:image>
        </draw:frame>
        <draw:frame draw:style-name="gr4" draw:text-style-name="P6" draw:layer="layout" svg:width="5.082cm" svg:height="0.963cm" svg:x="11.965cm" svg:y="18.838cm">
          <draw:text-box>
            <text:p text:style-name="P5"><text:span text:style-name="T4">Marco Equisetto</text:span></text:p>
          </draw:text-box>
        </draw:frame>
        <draw:frame draw:style-name="gr5" draw:text-style-name="P7" draw:layer="layout" svg:width="4.258cm" svg:height="0.963cm" svg:x="12.789cm" svg:y="19.639cm">
          <draw:text-box>
            <text:p text:style-name="P5"><text:span text:style-name="T5">VR535007</text:span></text:p>
          </draw:text-box>
        </draw:frame>
        <draw:frame draw:style-name="gr6" draw:text-style-name="P8" draw:layer="layout" svg:width="20.297cm" svg:height="1.4cm" svg:x="3.852cm" svg:y="4.1cm">
          <draw:text-box>
            <text:p text:style-name="P1"><text:span text:style-name="T6">Achieving Diamonds in Minecraft Purely from Offline Data</text:span></text:p>
          </draw:text-box>
        </draw:frame>
        <draw:frame draw:style-name="gr7" draw:text-style-name="P9" draw:layer="layout" svg:width="21.978cm" svg:height="10.818cm" svg:x="3.011cm" svg:y="7.082cm">
          <draw:image xlink:href="Pictures/10000201000004C70000025A2C9BCBD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2" draw:text-style-name="P10" draw:layer="layout" svg:width="25.199cm" svg:height="13.859cm" svg:x="1.4cm" svg:y="2.914cm" presentation:class="outline" presentation:user-transformed="true">
          <draw:text-box>
            <text:list text:style-name="L2">
              <text:list-item>
                <text:p text:style-name="P10"><text:span text:style-name="T7">The Bottleneck</text:span>: Standard RL needs millions of real-world interactions (slow, expensive, unsafe for robots)</text:p>
                <text:p text:style-name="P10"/>
              </text:list-item>
              <text:list-item>
                <text:p text:style-name="P10"><text:span text:style-name="T7">The Solution</text:span>: Train a "World Model" to simulate the environment... agent learns policy in "imagination"</text:p>
                <text:p text:style-name="P10"/>
              </text:list-item>
              <text:list-item>
                <text:p text:style-name="P10"><text:span text:style-name="T7">DreamerV4 Innovation</text:span>: Replaces Recurrent State Space Models (RSSMs) with scalable Block-Causal Transformers, the same architecture family behind modern LLMs</text:p>
              </text:list-item>
            </text:list>
          </draw:text-box>
        </draw:frame>
        <draw:frame draw:style-name="gr9" draw:text-style-name="P11" draw:layer="layout" svg:width="20.007cm" svg:height="1.964cm" svg:x="0.793cm" svg:y="0.636cm">
          <draw:text-box>
            <text:p text:style-name="P11"><text:span text:style-name="T8">The World Model Paradig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2" draw:text-style-name="P10" draw:layer="layout" svg:width="25.199cm" svg:height="13.859cm" svg:x="1.4cm" svg:y="2.914cm" presentation:class="outline" presentation:user-transformed="true">
          <draw:text-box>
            <text:list text:style-name="L2">
              <text:list-item>
                <text:p text:style-name="P10"><text:span text:style-name="T7">Objective</text:span>: Compress high-dimensional pixels into a compact sequence of latent vectors</text:p>
                <text:p text:style-name="P10"/>
              </text:list-item>
              <text:list-item>
                <text:p text:style-name="P10"><text:span text:style-name="T7">Mechanism</text:span>: Masked Autoencoders (MAE) randomly hide up to 90% of image patches during training</text:p>
                <text:p text:style-name="P10"/>
              </text:list-item>
              <text:list-item>
                <text:p text:style-name="P10"><text:span text:style-name="T9">Why does it matter?</text:span>: Forces the encoder to learn robust semantic features, not just pixel compression</text:p>
              </text:list-item>
            </text:list>
          </draw:text-box>
        </draw:frame>
        <draw:frame draw:style-name="gr9" draw:text-style-name="P11" draw:layer="layout" svg:width="20.007cm" svg:height="1.964cm" svg:x="0.793cm" svg:y="0.636cm">
          <draw:text-box>
            <text:p text:style-name="P11"><text:span text:style-name="T8">Architecture: The Tokenizer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2" draw:text-style-name="P10" draw:layer="layout" svg:width="25.199cm" svg:height="13.859cm" svg:x="1.4cm" svg:y="2.914cm" presentation:class="outline" presentation:user-transformed="true">
          <draw:text-box>
            <text:list text:style-name="L2">
              <text:list-item>
                <text:p text:style-name="P10"><text:span text:style-name="T7">Objective</text:span>: Predict future latent states from past states + continuous actions</text:p>
                <text:p text:style-name="P10"/>
              </text:list-item>
              <text:list-item>
                <text:p text:style-name="P10"><text:span text:style-name="T7">Shortcut Forcing</text:span>: Uses a denoising schedule (τ) to jump directly to state t+k, instead of step-by-step (t+1, t+2, …)</text:p>
                <text:p text:style-name="P10"/>
              </text:list-item>
              <text:list-item>
                <text:p text:style-name="P10"><text:span text:style-name="T7">Benefit</text:span>: Faster long-horizon imagination, no compounding sequential errors</text:p>
              </text:list-item>
            </text:list>
          </draw:text-box>
        </draw:frame>
        <draw:frame draw:style-name="gr10" draw:text-style-name="P11" draw:layer="layout" svg:width="22.607cm" svg:height="3.095cm" svg:x="0.793cm" svg:y="0.636cm">
          <draw:text-box>
            <text:p text:style-name="P11"><text:span text:style-name="T8">Architecture: The Dynamics Model</text:span></text:p>
            <text:p text:style-name="P11"><text:span text:style-name="T8"/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6-19T10:44:18.36</meta:creation-date>
    <meta:editing-duration>PT14M17S</meta:editing-duration>
    <meta:editing-cycles>3</meta:editing-cycles>
    <dc:date>2026-07-03T10:17:47.53</dc:date>
    <meta:generator>OpenOffice/4.1.15$Win32 OpenOffice.org_project/4115m2$Build-9813</meta:generator>
    <meta:document-statistic meta:object-count="42"/>
  </office:meta>
</office:document-meta>
</file>