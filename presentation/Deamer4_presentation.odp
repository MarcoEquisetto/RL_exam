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1F000001D8014A434D.png"/>
  <manifest:file-entry manifest:media-type="image/png" manifest:full-path="Pictures/10000201000004C70000025A2C9BCBD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3.151cm" fo:min-width="17.9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101cm" fo:min-width="9.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Oggetto_20_senza_20_riempimento_20_e_20_linea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4.499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3.758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15cm" fo:min-width="19.684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40pt" fo:font-style="normal" fo:text-shadow="none" style:text-underline-style="none" fo:font-weight="normal" style:letter-kerning="true" style:font-family-asian="'Andale Sans UI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4pt" fo:font-style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22pt" fo:font-style="italic" style:font-size-asian="22pt" style:font-style-asian="italic" style:font-size-complex="22pt" style:font-style-complex="italic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22pt" fo:font-style="italic" fo:text-shadow="none" style:text-underline-style="none" fo:font-weight="normal" style:letter-kerning="true" style:font-family-asian="'Andale Sans UI'" style:font-family-generic-asian="system" style:font-pitch-asian="variable" style:font-size-asian="22pt" style:font-style-asian="italic" style:font-weight-asian="normal" style:font-family-complex="Tahoma" style:font-family-generic-complex="system" style:font-pitch-complex="variable" style:font-size-complex="22pt" style:font-style-complex="italic" style:font-weight-complex="normal" style:text-emphasize="none" style:font-relief="none"/>
    </style:style>
    <style:style style:name="P1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style-name="Corsivo" style:font-family-generic="swiss" style:font-pitch="variable" fo:font-size="40pt" fo:font-style="normal" fo:text-shadow="none" style:text-underline-style="none" fo:font-weight="normal" style:letter-kerning="true" style:font-family-asian="'Andale Sans UI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style-name="Corsivo" style:font-family-generic="swiss" style:font-pitch="variable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style-name="Corsivo" style:font-family-generic="swiss" style:font-pitch="variable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style-name="Corsivo" style:font-family-generic="swiss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Arial" style:font-style-name="Corsivo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Arial" style:font-style-name="Corsivo" style:font-family-generic="swiss" style:font-pitch="variable" fo:font-size="22pt" fo:font-style="italic" fo:text-shadow="none" style:text-underline-style="none" fo:font-weight="normal" style:letter-kerning="true" style:font-family-asian="'Andale Sans UI'" style:font-family-generic-asian="system" style:font-pitch-asian="variable" style:font-size-asian="22pt" style:font-style-asian="italic" style:font-weight-asian="normal" style:font-family-complex="Tahoma" style:font-family-generic-complex="system" style:font-pitch-complex="variable" style:font-size-complex="22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2" draw:layer="layout" svg:width="21.013cm" svg:height="3.401cm" svg:x="3.494cm" svg:y="0.8cm">
          <draw:text-box>
            <text:p text:style-name="P1"><text:span text:style-name="T1">DreamerV4: Training Agents </text:span></text:p>
            <text:p text:style-name="P1"><text:span text:style-name="T1">Inside of Scalable World Models </text:span></text:p>
          </draw:text-box>
        </draw:frame>
        <draw:frame draw:style-name="gr2" draw:text-style-name="P4" draw:layer="layout" svg:width="10.341cm" svg:height="1.351cm" svg:x="8.83cm" svg:y="5.449cm">
          <draw:text-box>
            <text:p text:style-name="P3"><text:span text:style-name="T2">Reinforcement Learning Paper Examination</text:span></text:p>
            <text:p text:style-name="P3"><text:span text:style-name="T3">University of Verona, </text:span><text:span text:style-name="T2">Academic Year 2025/26</text:span></text:p>
          </draw:text-box>
        </draw:frame>
        <draw:frame draw:style-name="gr3" draw:text-style-name="P5" draw:layer="layout" svg:width="5.602cm" svg:height="2.017cm" svg:x="0.229cm" svg:y="18.539cm">
          <draw:image xlink:href="Pictures/100002010000051F000001D8014A434D.png" xlink:type="simple" xlink:show="embed" xlink:actuate="onLoad">
            <text:p/>
          </draw:image>
        </draw:frame>
        <draw:frame draw:style-name="gr4" draw:text-style-name="P7" draw:layer="layout" svg:width="5.082cm" svg:height="0.963cm" svg:x="11.965cm" svg:y="18.838cm">
          <draw:text-box>
            <text:p text:style-name="P6"><text:span text:style-name="T4">Marco Equisetto</text:span></text:p>
          </draw:text-box>
        </draw:frame>
        <draw:frame draw:style-name="gr5" draw:text-style-name="P8" draw:layer="layout" svg:width="4.258cm" svg:height="0.963cm" svg:x="12.789cm" svg:y="19.639cm">
          <draw:text-box>
            <text:p text:style-name="P6"><text:span text:style-name="T5">VR535007</text:span></text:p>
          </draw:text-box>
        </draw:frame>
        <draw:frame draw:style-name="gr6" draw:text-style-name="P10" draw:layer="layout" svg:width="20.297cm" svg:height="1.4cm" svg:x="3.852cm" svg:y="4.1cm">
          <draw:text-box>
            <text:p text:style-name="P9"><text:span text:style-name="T6">Achieving Diamonds in Minecraft Purely from Offline Data</text:span></text:p>
          </draw:text-box>
        </draw:frame>
        <draw:frame draw:style-name="gr7" draw:text-style-name="P11" draw:layer="layout" svg:width="21.978cm" svg:height="10.818cm" svg:x="3.011cm" svg:y="7.082cm">
          <draw:image xlink:href="Pictures/10000201000004C70000025A2C9BCBD7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6-19T10:44:18.36</meta:creation-date>
    <meta:editing-duration>PT7M</meta:editing-duration>
    <meta:editing-cycles>2</meta:editing-cycles>
    <dc:date>2026-06-19T11:06:52</dc:date>
    <meta:document-statistic meta:object-count="30"/>
    <meta:generator>OpenOffice/4.1.15$Win32 OpenOffice.org_project/4115m2$Build-9813</meta:generator>
  </office:meta>
</office:document-meta>
</file>